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ED000002F06A597ECB.png" manifest:media-type="image/png"/>
  <manifest:file-entry manifest:full-path="Pictures/10000000000002AB00000180D6588452.png" manifest:media-type="image/png"/>
  <manifest:file-entry manifest:full-path="Pictures/100000010000045800000307821C3287.png" manifest:media-type="image/png"/>
  <manifest:file-entry manifest:full-path="Pictures/1000000100000345000000E5CC6B3CD7.png" manifest:media-type="image/png"/>
  <manifest:file-entry manifest:full-path="Pictures/10000000000003BD00000268DF263DDA.jpg" manifest:media-type="image/jpeg"/>
  <manifest:file-entry manifest:full-path="Pictures/1000000100000347000000E61F7AA932.png" manifest:media-type="image/png"/>
  <manifest:file-entry manifest:full-path="Pictures/100000000000044E000002EE03786703.png" manifest:media-type="image/png"/>
  <manifest:file-entry manifest:full-path="Pictures/1000000100000456000003097FE29258.png" manifest:media-type="image/png"/>
  <manifest:file-entry manifest:full-path="Pictures/1000000000000333000000C785B34B8D.png" manifest:media-type="image/png"/>
  <manifest:file-entry manifest:full-path="Pictures/100000010000045800000308D64C3000.png" manifest:media-type="image/png"/>
  <manifest:file-entry manifest:full-path="Pictures/10000001000003A5000003527924A450.png" manifest:media-type="image/png"/>
  <manifest:file-entry manifest:full-path="Pictures/1000000100000344000000E719DA6462.png" manifest:media-type="image/png"/>
  <manifest:file-entry manifest:full-path="Pictures/100000000000033D000000E57B72235A.png" manifest:media-type="image/png"/>
  <manifest:file-entry manifest:full-path="Pictures/1000000100000340000000E7518CB938.png" manifest:media-type="image/png"/>
  <manifest:file-entry manifest:full-path="Pictures/1000000000000346000000E7CB7F1C53.png" manifest:media-type="image/png"/>
  <manifest:file-entry manifest:full-path="Pictures/1000000100000351000001092D976F44.png" manifest:media-type="image/png"/>
  <manifest:file-entry manifest:full-path="Pictures/1000000100000455000003084930BC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Mono" svg:font-family="'Luxi Mono'"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akTypeNaqsh" svg:font-family="PakTypeNaqsh" style:font-pitch="variable"/>
    <style:font-face style:name="Source Han Sans CN" svg:font-family="'Source Han Sans CN'" style:font-family-generic="system" style:font-pitch="variable"/>
    <style:font-face style:name="monospace" svg:font-family="monospace"/>
    <style:font-face style:name="monospace1" svg:font-family="monospace" style:font-pitch="fixed"/>
  </office:font-face-decls>
  <office:automatic-styles>
    <style:style style:name="Table1" style:family="table">
      <style:table-properties style:width="5.3319in" table:align="left"/>
    </style:style>
    <style:style style:name="Table1.A" style:family="table-column">
      <style:table-column-properties style:column-width="1.25in"/>
    </style:style>
    <style:style style:name="Table1.B" style:family="table-column">
      <style:table-column-properties style:column-width="1.9236in"/>
    </style:style>
    <style:style style:name="Table1.C" style:family="table-column">
      <style:table-column-properties style:column-width="2.1583in"/>
    </style:style>
    <style:style style:name="Table1.A1" style:family="table-cell">
      <style:table-cell-properties style:vertical-align="middle" fo:padding="0.0194in" fo:border="none"/>
    </style:style>
    <style:style style:name="Table2" style:family="table">
      <style:table-properties style:width="1.5097in" table:align="left"/>
    </style:style>
    <style:style style:name="Table2.A" style:family="table-column">
      <style:table-column-properties style:column-width="1.0049in"/>
    </style:style>
    <style:style style:name="Table2.B" style:family="table-column">
      <style:table-column-properties style:column-width="0.5049in"/>
    </style:style>
    <style:style style:name="Table2.A1" style:family="table-cell">
      <style:table-cell-properties style:vertical-align="middle" fo:padding="0.0194in" fo:border="none"/>
    </style:style>
    <style:style style:name="Table3" style:family="table">
      <style:table-properties style:width="4.2264in" table:align="left"/>
    </style:style>
    <style:style style:name="Table3.A" style:family="table-column">
      <style:table-column-properties style:column-width="0.9396in"/>
    </style:style>
    <style:style style:name="Table3.B" style:family="table-column">
      <style:table-column-properties style:column-width="1.0028in"/>
    </style:style>
    <style:style style:name="Table3.C" style:family="table-column">
      <style:table-column-properties style:column-width="2.284in"/>
    </style:style>
    <style:style style:name="Table3.A1" style:family="table-cell">
      <style:table-cell-properties style:vertical-align="middle" fo:padding="0.0194in" fo:border="none"/>
    </style:style>
    <style:style style:name="P1" style:family="paragraph" style:parent-style-name="Standard">
      <style:paragraph-properties fo:text-align="center" style:justify-single-word="false"/>
      <style:text-properties style:font-name="PakTypeNaqsh" fo:font-size="36pt" officeooo:paragraph-rsid="001a83d4" style:font-size-asian="36pt" style:font-size-complex="36pt"/>
    </style:style>
    <style:style style:name="P2" style:family="paragraph" style:parent-style-name="Standard">
      <style:paragraph-properties fo:text-align="center" style:justify-single-word="false"/>
      <style:text-properties fo:font-size="36pt" officeooo:paragraph-rsid="001a83d4" style:font-size-asian="36pt" style:font-size-complex="36pt"/>
    </style:style>
    <style:style style:name="P3" style:family="paragraph" style:parent-style-name="Standard">
      <style:text-properties officeooo:paragraph-rsid="001a83d4"/>
    </style:style>
    <style:style style:name="P4" style:family="paragraph" style:parent-style-name="Standard">
      <style:paragraph-properties fo:text-align="center" style:justify-single-word="false"/>
      <style:text-properties fo:font-size="18pt" officeooo:paragraph-rsid="001a83d4" style:font-size-asian="18pt" style:font-size-complex="18pt"/>
    </style:style>
    <style:style style:name="P5" style:family="paragraph" style:parent-style-name="Standard">
      <style:paragraph-properties fo:text-align="center" style:justify-single-word="false"/>
      <style:text-properties fo:font-size="6pt" officeooo:paragraph-rsid="001a83d4" style:font-size-asian="6pt" style:font-size-complex="6pt"/>
    </style:style>
    <style:style style:name="P6" style:family="paragraph" style:parent-style-name="Standard">
      <style:paragraph-properties fo:text-align="center" style:justify-single-word="false"/>
      <style:text-properties fo:font-size="10pt" officeooo:paragraph-rsid="001a83d4" style:font-size-asian="10pt" style:font-size-complex="10pt"/>
    </style:style>
    <style:style style:name="P7" style:family="paragraph" style:parent-style-name="Standard">
      <style:text-properties fo:font-weight="bold" officeooo:rsid="001a83d4" officeooo:paragraph-rsid="001a83d4" style:font-weight-asian="bold" style:font-weight-complex="bold"/>
    </style:style>
    <style:style style:name="P8" style:family="paragraph" style:parent-style-name="Standard">
      <style:text-properties officeooo:rsid="001a83d4" officeooo:paragraph-rsid="001a83d4"/>
    </style:style>
    <style:style style:name="P9" style:family="paragraph" style:parent-style-name="Standard">
      <style:text-properties fo:font-size="10pt" officeooo:rsid="001c1dcc" officeooo:paragraph-rsid="001c1dcc" style:font-size-asian="10pt" style:font-size-complex="10pt"/>
    </style:style>
    <style:style style:name="P10" style:family="paragraph" style:parent-style-name="Standard">
      <style:text-properties fo:font-size="10pt" officeooo:paragraph-rsid="001c1dcc" style:font-size-asian="10pt" style:font-size-complex="10pt"/>
    </style:style>
    <style:style style:name="P11" style:family="paragraph" style:parent-style-name="Standard">
      <style:text-properties fo:font-size="10pt" officeooo:paragraph-rsid="00915da8" style:font-size-asian="10pt" style:font-size-complex="10pt"/>
    </style:style>
    <style:style style:name="P12" style:family="paragraph" style:parent-style-name="Standard">
      <style:text-properties fo:font-size="10pt" officeooo:rsid="00901403" officeooo:paragraph-rsid="00901403" style:font-size-asian="10pt" style:font-size-complex="10pt"/>
    </style:style>
    <style:style style:name="P13" style:family="paragraph" style:parent-style-name="Standard">
      <style:text-properties fo:font-size="10pt" officeooo:rsid="001c2cd0" officeooo:paragraph-rsid="001c2cd0" style:font-size-asian="10pt" style:font-size-complex="10pt"/>
    </style:style>
    <style:style style:name="P14" style:family="paragraph" style:parent-style-name="Standard">
      <style:text-properties officeooo:rsid="001c2cd0" officeooo:paragraph-rsid="001c2cd0"/>
    </style:style>
    <style:style style:name="P15" style:family="paragraph" style:parent-style-name="Figure">
      <style:text-properties fo:font-size="8pt" style:font-size-asian="8pt" style:font-size-complex="8pt"/>
    </style:style>
    <style:style style:name="P16" style:family="paragraph" style:parent-style-name="Standard">
      <style:text-properties fo:font-size="10pt" officeooo:rsid="001cf21c" officeooo:paragraph-rsid="001cf21c" style:font-size-asian="10pt" style:font-size-complex="10pt"/>
    </style:style>
    <style:style style:name="P17" style:family="paragraph" style:parent-style-name="Standard">
      <style:text-properties officeooo:rsid="001cf21c" officeooo:paragraph-rsid="001cf21c"/>
    </style:style>
    <style:style style:name="P18" style:family="paragraph" style:parent-style-name="Standard">
      <style:text-properties officeooo:paragraph-rsid="007c3e5b"/>
    </style:style>
    <style:style style:name="P19" style:family="paragraph" style:parent-style-name="Standard">
      <style:text-properties fo:font-weight="bold" officeooo:rsid="001f8a32" officeooo:paragraph-rsid="001f8a32" style:font-weight-asian="bold" style:font-weight-complex="bold"/>
    </style:style>
    <style:style style:name="P20" style:family="paragraph" style:parent-style-name="Standard">
      <style:text-properties officeooo:paragraph-rsid="001f8a32"/>
    </style:style>
    <style:style style:name="P21" style:family="paragraph" style:parent-style-name="Standard">
      <style:text-properties officeooo:rsid="001f8a32" officeooo:paragraph-rsid="001f8a32"/>
    </style:style>
    <style:style style:name="P22" style:family="paragraph" style:parent-style-name="Standard">
      <style:text-properties fo:font-size="10pt" officeooo:rsid="001f8a32" officeooo:paragraph-rsid="001f8a32" style:font-size-asian="10pt" style:font-size-complex="10pt"/>
    </style:style>
    <style:style style:name="P23" style:family="paragraph" style:parent-style-name="Standard">
      <style:text-properties fo:font-size="10pt" officeooo:rsid="001f8a32" officeooo:paragraph-rsid="00215fcc" style:font-size-asian="10pt" style:font-size-complex="10pt"/>
    </style:style>
    <style:style style:name="P24" style:family="paragraph" style:parent-style-name="Standard">
      <style:text-properties fo:font-size="10pt" officeooo:rsid="00215fcc" officeooo:paragraph-rsid="00215fcc" style:font-size-asian="10pt" style:font-size-complex="10pt"/>
    </style:style>
    <style:style style:name="P25" style:family="paragraph" style:parent-style-name="Standard">
      <style:text-properties officeooo:rsid="00215fcc" officeooo:paragraph-rsid="00215fcc"/>
    </style:style>
    <style:style style:name="P26" style:family="paragraph" style:parent-style-name="Standard">
      <style:text-properties fo:font-size="12pt" fo:font-weight="normal" officeooo:paragraph-rsid="001c2cd0" style:font-size-asian="12pt" style:font-weight-asian="normal" style:font-size-complex="12pt" style:font-weight-complex="normal"/>
    </style:style>
    <style:style style:name="P27" style:family="paragraph" style:parent-style-name="Standard">
      <style:text-properties fo:font-size="12pt" fo:font-weight="bold" officeooo:rsid="002bcc83" officeooo:paragraph-rsid="009289df" style:font-size-asian="12pt" style:font-weight-asian="bold" style:font-size-complex="12pt" style:font-weight-complex="bold"/>
    </style:style>
    <style:style style:name="P28" style:family="paragraph" style:parent-style-name="Standard">
      <style:text-properties fo:font-size="10pt" fo:font-weight="normal" officeooo:rsid="002bcc83" officeooo:paragraph-rsid="009289df" style:font-size-asian="10pt" style:font-weight-asian="normal" style:font-size-complex="10pt" style:font-weight-complex="normal"/>
    </style:style>
    <style:style style:name="P29" style:family="paragraph" style:parent-style-name="Standard">
      <style:text-properties fo:font-size="10pt" fo:font-weight="normal" officeooo:rsid="008cb1af" officeooo:paragraph-rsid="009289df" style:font-size-asian="10pt" style:font-weight-asian="normal" style:font-size-complex="10pt" style:font-weight-complex="normal"/>
    </style:style>
    <style:style style:name="P30" style:family="paragraph" style:parent-style-name="Standard">
      <style:text-properties fo:font-size="10pt" fo:font-style="italic" fo:font-weight="normal" officeooo:rsid="0093030d" officeooo:paragraph-rsid="0093030d" style:font-size-asian="10pt" style:font-style-asian="italic" style:font-weight-asian="normal" style:font-size-complex="10pt" style:font-style-complex="italic" style:font-weight-complex="normal"/>
    </style:style>
    <style:style style:name="P31" style:family="paragraph" style:parent-style-name="Standard">
      <style:text-properties fo:font-size="12pt" fo:font-weight="bold" officeooo:rsid="002bcc83" officeooo:paragraph-rsid="002bcc83" style:font-size-asian="12pt" style:font-weight-asian="bold" style:font-size-complex="12pt" style:font-weight-complex="bold"/>
    </style:style>
    <style:style style:name="P32" style:family="paragraph" style:parent-style-name="Standard">
      <style:text-properties fo:font-size="10pt" fo:font-weight="normal" officeooo:rsid="002bcc83" officeooo:paragraph-rsid="0093030d" style:font-size-asian="10pt" style:font-weight-asian="normal" style:font-size-complex="10pt" style:font-weight-complex="normal"/>
    </style:style>
    <style:style style:name="P33" style:family="paragraph" style:parent-style-name="Standard">
      <style:text-properties fo:font-size="10pt" fo:font-weight="normal" officeooo:rsid="002bcc83" officeooo:paragraph-rsid="002bcc83" style:font-size-asian="10pt" style:font-weight-asian="normal" style:font-size-complex="10pt" style:font-weight-complex="normal"/>
    </style:style>
    <style:style style:name="P34" style:family="paragraph" style:parent-style-name="Standard">
      <style:text-properties fo:font-size="12pt" fo:font-weight="normal" officeooo:rsid="002bcc83" officeooo:paragraph-rsid="002bcc83" style:font-size-asian="12pt" style:font-weight-asian="normal" style:font-size-complex="12pt" style:font-weight-complex="normal"/>
    </style:style>
    <style:style style:name="P35" style:family="paragraph" style:parent-style-name="Standard">
      <style:text-properties fo:font-size="12pt" fo:font-weight="bold" officeooo:rsid="001a83d4" officeooo:paragraph-rsid="001a83d4" style:font-size-asian="12pt" style:font-weight-asian="bold" style:font-size-complex="12pt" style:font-weight-complex="bold"/>
    </style:style>
    <style:style style:name="P36" style:family="paragraph" style:parent-style-name="Standard">
      <style:text-properties fo:font-size="10pt" fo:font-weight="normal" officeooo:rsid="008cb1af" officeooo:paragraph-rsid="002bcc83" style:font-size-asian="10pt" style:font-weight-asian="normal" style:font-size-complex="10pt" style:font-weight-complex="normal"/>
    </style:style>
    <style:style style:name="P37" style:family="paragraph" style:parent-style-name="Standard">
      <style:text-properties fo:font-size="10pt" fo:font-weight="normal" officeooo:rsid="005c2837" officeooo:paragraph-rsid="005c2837" style:font-size-asian="10pt" style:font-weight-asian="normal" style:font-size-complex="10pt" style:font-weight-complex="normal"/>
    </style:style>
    <style:style style:name="P38" style:family="paragraph" style:parent-style-name="Standard">
      <style:text-properties fo:font-size="10pt" fo:font-weight="normal" officeooo:rsid="001b9471" officeooo:paragraph-rsid="001b9471" style:font-size-asian="8.75pt" style:font-weight-asian="normal" style:font-size-complex="10pt" style:font-weight-complex="normal"/>
    </style:style>
    <style:style style:name="P39" style:family="paragraph" style:parent-style-name="Standard">
      <style:text-properties officeooo:paragraph-rsid="0086c889"/>
    </style:style>
    <style:style style:name="P40" style:family="paragraph" style:parent-style-name="Standard">
      <style:text-properties fo:font-size="10pt" fo:font-weight="normal" officeooo:rsid="001b9471" officeooo:paragraph-rsid="001b9471" style:font-size-asian="10pt" style:font-weight-asian="normal" style:font-size-complex="10pt" style:font-weight-complex="normal"/>
    </style:style>
    <style:style style:name="P41" style:family="paragraph" style:parent-style-name="Standard">
      <style:text-properties fo:font-size="10pt" fo:font-weight="normal" officeooo:rsid="00212441" officeooo:paragraph-rsid="00212441" style:font-size-asian="10pt" style:font-weight-asian="normal" style:font-size-complex="10pt" style:font-weight-complex="normal"/>
    </style:style>
    <style:style style:name="P42" style:family="paragraph" style:parent-style-name="Standard">
      <style:text-properties fo:font-size="12pt" fo:font-weight="bold" officeooo:rsid="00212441" officeooo:paragraph-rsid="003722a2" style:font-size-asian="12pt" style:font-weight-asian="bold" style:font-size-complex="12pt" style:font-weight-complex="bold"/>
    </style:style>
    <style:style style:name="P43" style:family="paragraph" style:parent-style-name="Standard">
      <style:text-properties fo:font-size="12pt" fo:font-weight="bold" officeooo:rsid="00212441" officeooo:paragraph-rsid="00212441" style:font-size-asian="12pt" style:font-weight-asian="bold" style:font-size-complex="12pt" style:font-weight-complex="bold"/>
    </style:style>
    <style:style style:name="P44" style:family="paragraph" style:parent-style-name="Standard">
      <style:text-properties fo:font-size="10pt" fo:font-weight="normal" officeooo:rsid="004697d9" officeooo:paragraph-rsid="004697d9" style:font-size-asian="10pt" style:font-weight-asian="normal" style:font-size-complex="10pt" style:font-weight-complex="normal"/>
    </style:style>
    <style:style style:name="P45" style:family="paragraph" style:parent-style-name="Standard">
      <style:text-properties fo:font-size="10pt" fo:font-weight="normal" officeooo:rsid="002d4a56" officeooo:paragraph-rsid="002d4a56" style:font-size-asian="10pt" style:font-weight-asian="normal" style:font-size-complex="10pt" style:font-weight-complex="normal"/>
    </style:style>
    <style:style style:name="P46" style:family="paragraph" style:parent-style-name="Standard">
      <style:text-properties fo:color="#c9211e" loext:opacity="100%" fo:font-size="10pt" fo:font-weight="normal" officeooo:rsid="002d4a56" officeooo:paragraph-rsid="002d4a56" style:font-size-asian="10pt" style:font-weight-asian="normal" style:font-size-complex="10pt" style:font-weight-complex="normal"/>
    </style:style>
    <style:style style:name="P47" style:family="paragraph" style:parent-style-name="Standard">
      <style:text-properties fo:font-size="10pt" fo:font-weight="normal" officeooo:rsid="002d4a56" officeooo:paragraph-rsid="0035b102" style:font-size-asian="10pt" style:font-weight-asian="normal" style:font-size-complex="10pt" style:font-weight-complex="normal"/>
    </style:style>
    <style:style style:name="P48" style:family="paragraph" style:parent-style-name="Standard">
      <style:text-properties fo:font-size="10pt" fo:font-weight="normal" officeooo:rsid="002d4a56" officeooo:paragraph-rsid="004dcadd" style:font-size-asian="10pt" style:font-weight-asian="normal" style:font-size-complex="10pt" style:font-weight-complex="normal"/>
    </style:style>
    <style:style style:name="P49" style:family="paragraph" style:parent-style-name="Standard">
      <style:text-properties fo:color="#0000cc" loext:opacity="100%" fo:font-size="10pt" fo:font-weight="normal" officeooo:rsid="006c0fec" officeooo:paragraph-rsid="006c0fec" style:font-size-asian="10pt" style:font-weight-asian="normal" style:font-size-complex="10pt" style:font-weight-complex="normal"/>
    </style:style>
    <style:style style:name="P50" style:family="paragraph" style:parent-style-name="Standard">
      <style:text-properties fo:font-size="10pt" fo:font-weight="normal" officeooo:rsid="002d4a56" officeooo:paragraph-rsid="004f4e60" style:font-size-asian="10pt" style:font-weight-asian="normal" style:font-size-complex="10pt" style:font-weight-complex="normal"/>
    </style:style>
    <style:style style:name="P51" style:family="paragraph" style:parent-style-name="Standard">
      <style:text-properties fo:font-size="10pt" fo:font-weight="normal" officeooo:rsid="002d4a56" officeooo:paragraph-rsid="002df9af" style:font-size-asian="10pt" style:font-weight-asian="normal" style:font-size-complex="10pt" style:font-weight-complex="normal"/>
    </style:style>
    <style:style style:name="P52" style:family="paragraph" style:parent-style-name="Standard">
      <style:text-properties fo:font-size="10pt" fo:font-weight="normal" officeooo:rsid="005f1433" officeooo:paragraph-rsid="005f1433" style:font-size-asian="10pt" style:font-weight-asian="normal" style:font-size-complex="10pt" style:font-weight-complex="normal"/>
    </style:style>
    <style:style style:name="P53" style:family="paragraph" style:parent-style-name="Standard">
      <style:text-properties fo:color="#c9211e" loext:opacity="100%" fo:font-size="10pt" fo:font-weight="normal" officeooo:rsid="005f1433" officeooo:paragraph-rsid="005f1433" style:font-size-asian="10pt" style:font-weight-asian="normal" style:font-size-complex="10pt" style:font-weight-complex="normal"/>
    </style:style>
    <style:style style:name="P54" style:family="paragraph" style:parent-style-name="Standard">
      <style:text-properties fo:font-size="10pt" fo:font-weight="normal" officeooo:rsid="002d4a56" officeooo:paragraph-rsid="00374478" style:font-size-asian="10pt" style:font-weight-asian="normal" style:font-size-complex="10pt" style:font-weight-complex="normal"/>
    </style:style>
    <style:style style:name="P55" style:family="paragraph" style:parent-style-name="Standard">
      <style:text-properties fo:font-size="10pt" fo:font-weight="normal" officeooo:rsid="002df9af" officeooo:paragraph-rsid="00374478" style:font-size-asian="10pt" style:font-weight-asian="normal" style:font-size-complex="10pt" style:font-weight-complex="normal"/>
    </style:style>
    <style:style style:name="P56" style:family="paragraph" style:parent-style-name="Standard">
      <style:text-properties fo:color="#c9211e" loext:opacity="100%" fo:font-size="10pt" fo:font-weight="normal" officeooo:rsid="002ee270" officeooo:paragraph-rsid="002ee270" style:font-size-asian="10pt" style:font-weight-asian="normal" style:font-size-complex="10pt" style:font-weight-complex="normal"/>
    </style:style>
    <style:style style:name="P57" style:family="paragraph" style:parent-style-name="Standard">
      <style:text-properties fo:font-size="10pt" fo:font-weight="normal" officeooo:rsid="002df9af" officeooo:paragraph-rsid="00819fec" style:font-size-asian="10pt" style:font-weight-asian="normal" style:font-size-complex="10pt" style:font-weight-complex="normal"/>
    </style:style>
    <style:style style:name="P58" style:family="paragraph" style:parent-style-name="Standard">
      <style:text-properties fo:color="#000000" loext:opacity="100%" fo:font-size="10pt" fo:font-weight="normal" officeooo:rsid="00735edf" officeooo:paragraph-rsid="00819fec" style:font-size-asian="10pt" style:font-weight-asian="normal" style:font-size-complex="10pt" style:font-weight-complex="normal"/>
    </style:style>
    <style:style style:name="P59" style:family="paragraph" style:parent-style-name="Heading_20_2">
      <style:text-properties fo:color="#000000" loext:opacity="100%" fo:font-size="10pt" fo:font-weight="normal" officeooo:rsid="00735edf" officeooo:paragraph-rsid="00819fec" style:font-size-asian="10pt" style:font-weight-asian="normal" style:font-size-complex="10pt" style:font-weight-complex="normal"/>
    </style:style>
    <style:style style:name="P60" style:family="paragraph" style:parent-style-name="Text_20_body">
      <style:text-properties fo:color="#000000" loext:opacity="100%" fo:font-size="10pt" officeooo:rsid="00735edf" style:font-size-asian="10pt" style:font-size-complex="10pt"/>
    </style:style>
    <style:style style:name="P61" style:family="paragraph" style:parent-style-name="Standard">
      <style:text-properties fo:font-size="10pt" fo:font-weight="normal" officeooo:rsid="00819fec" officeooo:paragraph-rsid="00819fec" style:font-size-asian="10pt" style:font-weight-asian="normal" style:font-size-complex="10pt" style:font-weight-complex="normal"/>
    </style:style>
    <style:style style:name="P62" style:family="paragraph" style:parent-style-name="Standard">
      <style:text-properties fo:font-size="10pt" fo:font-weight="normal" officeooo:rsid="002df9af" officeooo:paragraph-rsid="002ee270" style:font-size-asian="10pt" style:font-weight-asian="normal" style:font-size-complex="10pt" style:font-weight-complex="normal"/>
    </style:style>
    <style:style style:name="P63" style:family="paragraph" style:parent-style-name="Standard">
      <style:text-properties officeooo:rsid="002f3ef6" officeooo:paragraph-rsid="00812015"/>
    </style:style>
    <style:style style:name="P64" style:family="paragraph" style:parent-style-name="Standard">
      <style:text-properties style:font-name="Luxi Mono" fo:font-size="8pt" fo:font-style="italic" fo:font-weight="normal" officeooo:rsid="007f8019" officeooo:paragraph-rsid="00812015" style:font-size-asian="8pt" style:font-style-asian="italic" style:font-weight-asian="normal" style:font-size-complex="8pt" style:font-style-complex="italic" style:font-weight-complex="normal"/>
    </style:style>
    <style:style style:name="P65" style:family="paragraph" style:parent-style-name="Standard">
      <style:text-properties fo:font-size="10pt" officeooo:rsid="002f3ef6" officeooo:paragraph-rsid="00812015" style:font-size-asian="10pt" style:font-size-complex="10pt"/>
    </style:style>
    <style:style style:name="P66" style:family="paragraph" style:parent-style-name="Standard">
      <style:text-properties fo:color="#000000" loext:opacity="100%" fo:font-size="10pt" officeooo:rsid="007f8019" officeooo:paragraph-rsid="00812015" style:font-size-asian="10pt" style:font-size-complex="10pt"/>
    </style:style>
    <style:style style:name="P67" style:family="paragraph" style:parent-style-name="Standard">
      <style:text-properties fo:font-size="10pt" fo:font-weight="normal" officeooo:rsid="002df9af" officeooo:paragraph-rsid="002f3ef6" style:font-size-asian="10pt" style:font-weight-asian="normal" style:font-size-complex="10pt" style:font-weight-complex="normal"/>
    </style:style>
    <style:style style:name="P68" style:family="paragraph" style:parent-style-name="Standard">
      <style:text-properties fo:color="#c9211e" loext:opacity="100%" fo:font-size="10pt" fo:font-weight="normal" officeooo:rsid="002f3ef6" officeooo:paragraph-rsid="002f3ef6" style:font-size-asian="10pt" style:font-weight-asian="normal" style:font-size-complex="10pt" style:font-weight-complex="normal"/>
    </style:style>
    <style:style style:name="P69" style:family="paragraph" style:parent-style-name="Standard">
      <style:text-properties fo:font-size="10pt" fo:font-weight="normal" officeooo:rsid="002f3ef6" officeooo:paragraph-rsid="0031ee46" style:font-size-asian="10pt" style:font-weight-asian="normal" style:font-size-complex="10pt" style:font-weight-complex="normal"/>
    </style:style>
    <style:style style:name="P70" style:family="paragraph" style:parent-style-name="Standard">
      <style:text-properties fo:font-size="10pt" fo:font-weight="normal" officeooo:rsid="002f3ef6" officeooo:paragraph-rsid="002f3ef6" style:font-size-asian="10pt" style:font-weight-asian="normal" style:font-size-complex="10pt" style:font-weight-complex="normal"/>
    </style:style>
    <style:style style:name="P71" style:family="paragraph" style:parent-style-name="Standard">
      <style:text-properties fo:color="#000000" loext:opacity="100%" fo:font-size="10pt" fo:font-weight="normal" officeooo:rsid="0023507a" officeooo:paragraph-rsid="0031ee46" style:font-size-asian="10pt" style:font-weight-asian="normal" style:font-size-complex="10pt" style:font-weight-complex="normal"/>
    </style:style>
    <style:style style:name="P72" style:family="paragraph" style:parent-style-name="Heading_20_2">
      <style:text-properties fo:font-size="10pt" officeooo:rsid="002df9af" officeooo:paragraph-rsid="00819fec" style:font-size-asian="10pt" style:font-size-complex="10pt"/>
    </style:style>
    <style:style style:name="P73" style:family="paragraph" style:parent-style-name="Standard">
      <style:text-properties officeooo:rsid="002f3ef6" officeooo:paragraph-rsid="007f8019"/>
    </style:style>
    <style:style style:name="P74" style:family="paragraph" style:parent-style-name="Standard">
      <style:text-properties style:font-name="Luxi Mono" fo:font-size="8pt" fo:font-style="italic" officeooo:rsid="002f3ef6" officeooo:paragraph-rsid="007f8019" style:font-size-asian="8pt" style:font-style-asian="italic" style:font-size-complex="8pt" style:font-style-complex="italic"/>
    </style:style>
    <style:style style:name="P75" style:family="paragraph" style:parent-style-name="Standard">
      <style:text-properties officeooo:rsid="002f3ef6" officeooo:paragraph-rsid="00805ea4"/>
    </style:style>
    <style:style style:name="P76" style:family="paragraph" style:parent-style-name="Standard">
      <style:text-properties fo:font-size="10pt" fo:font-weight="normal" officeooo:rsid="002f3ef6" officeooo:paragraph-rsid="007f8019" style:font-size-asian="10pt" style:font-weight-asian="normal" style:font-size-complex="10pt" style:font-weight-complex="normal"/>
    </style:style>
    <style:style style:name="P77" style:family="paragraph" style:parent-style-name="Standard">
      <style:text-properties fo:font-size="10pt" officeooo:rsid="002f3ef6" officeooo:paragraph-rsid="007f8019" style:font-size-asian="10pt" style:font-size-complex="10pt"/>
    </style:style>
    <style:style style:name="P78" style:family="paragraph" style:parent-style-name="Standard">
      <style:text-properties fo:color="#000000" loext:opacity="100%" fo:font-size="10pt" officeooo:rsid="007f8019" officeooo:paragraph-rsid="007f8019" style:font-size-asian="10pt" style:font-size-complex="10pt"/>
    </style:style>
    <style:style style:name="P79" style:family="paragraph" style:parent-style-name="Standard">
      <style:text-properties fo:font-size="10pt" fo:font-weight="normal" officeooo:rsid="006c0fec" officeooo:paragraph-rsid="006cf84c" style:font-size-asian="10pt" style:font-weight-asian="normal" style:font-size-complex="10pt" style:font-weight-complex="normal"/>
    </style:style>
    <style:style style:name="P80" style:family="paragraph" style:parent-style-name="Standard">
      <style:text-properties fo:color="#0000cc" loext:opacity="100%" fo:font-size="10pt" fo:font-weight="normal" officeooo:rsid="006c0fec" officeooo:paragraph-rsid="006cf84c" style:font-size-asian="10pt" style:font-weight-asian="normal" style:font-size-complex="10pt" style:font-weight-complex="normal"/>
    </style:style>
    <style:style style:name="P81" style:family="paragraph" style:parent-style-name="Standard">
      <style:text-properties fo:font-size="10pt" fo:font-weight="normal" officeooo:rsid="002d4a56" officeooo:paragraph-rsid="006cf84c" style:font-size-asian="10pt" style:font-weight-asian="normal" style:font-size-complex="10pt" style:font-weight-complex="normal"/>
    </style:style>
    <style:style style:name="P82" style:family="paragraph" style:parent-style-name="Standard">
      <style:text-properties fo:color="#0000cc" loext:opacity="100%" fo:font-size="10pt" fo:font-weight="normal" officeooo:rsid="006cf84c" officeooo:paragraph-rsid="006cf84c" style:font-size-asian="10pt" style:font-weight-asian="normal" style:font-size-complex="10pt" style:font-weight-complex="normal"/>
    </style:style>
    <style:style style:name="P83" style:family="paragraph" style:parent-style-name="Standard">
      <style:text-properties fo:color="#0000cc" loext:opacity="100%" fo:font-size="10pt" fo:font-weight="normal" officeooo:rsid="0073c21b" officeooo:paragraph-rsid="0073c21b" style:font-size-asian="10pt" style:font-weight-asian="normal" style:font-size-complex="10pt" style:font-weight-complex="normal"/>
    </style:style>
    <style:style style:name="P84" style:family="paragraph" style:parent-style-name="Standard">
      <style:text-properties fo:color="#c9211e" loext:opacity="100%" fo:font-size="10pt" fo:font-weight="normal" officeooo:rsid="0065d4ee" officeooo:paragraph-rsid="006cf84c" style:font-size-asian="10pt" style:font-weight-asian="normal" style:font-size-complex="10pt" style:font-weight-complex="normal"/>
    </style:style>
    <style:style style:name="P85" style:family="paragraph" style:parent-style-name="Standard">
      <style:text-properties fo:font-size="10pt" fo:font-weight="normal" officeooo:rsid="002df9af" officeooo:paragraph-rsid="006cf84c" style:font-size-asian="10pt" style:font-weight-asian="normal" style:font-size-complex="10pt" style:font-weight-complex="normal"/>
    </style:style>
    <style:style style:name="P86" style:family="paragraph" style:parent-style-name="Standard">
      <style:text-properties fo:color="#ff3333" loext:opacity="100%" fo:font-size="10pt" fo:font-weight="normal" officeooo:rsid="0023507a" officeooo:paragraph-rsid="006cf84c" style:font-size-asian="10pt" style:font-weight-asian="normal" style:font-size-complex="10pt" style:font-weight-complex="normal"/>
    </style:style>
    <style:style style:name="P87" style:family="paragraph" style:parent-style-name="Standard">
      <style:text-properties fo:color="#000000" loext:opacity="100%" fo:font-size="10pt" fo:font-weight="normal" officeooo:rsid="006ffb36" officeooo:paragraph-rsid="006ffb36" style:font-size-asian="10pt" style:font-weight-asian="normal" style:font-size-complex="10pt" style:font-weight-complex="normal"/>
    </style:style>
    <style:style style:name="P88" style:family="paragraph" style:parent-style-name="Standard">
      <style:text-properties fo:color="#ff3333" loext:opacity="100%" fo:font-size="10pt" fo:font-weight="normal" officeooo:rsid="006ffb36" officeooo:paragraph-rsid="006ffb36" style:font-size-asian="10pt" style:font-weight-asian="normal" style:font-size-complex="10pt" style:font-weight-complex="normal"/>
    </style:style>
    <style:style style:name="P89" style:family="paragraph" style:parent-style-name="Standard">
      <style:text-properties fo:color="#0000cc" loext:opacity="100%" fo:font-size="10pt" fo:font-weight="normal" officeooo:rsid="006c0fec" officeooo:paragraph-rsid="006e7d89" style:font-size-asian="10pt" style:font-weight-asian="normal" style:font-size-complex="10pt" style:font-weight-complex="normal"/>
    </style:style>
    <style:style style:name="P90" style:family="paragraph" style:parent-style-name="Text_20_body">
      <style:text-properties fo:font-size="10pt" officeooo:paragraph-rsid="0031ee46" style:font-size-asian="10pt" style:font-size-complex="10pt"/>
    </style:style>
    <style:style style:name="P91" style:family="paragraph" style:parent-style-name="Text_20_body">
      <style:text-properties fo:font-size="10pt" officeooo:paragraph-rsid="007167dc" style:font-size-asian="10pt" style:font-size-complex="10pt"/>
    </style:style>
    <style:style style:name="P92" style:family="paragraph" style:parent-style-name="Text_20_body">
      <style:text-properties fo:font-size="10pt" officeooo:rsid="007e4d67" officeooo:paragraph-rsid="00812015" style:font-size-asian="10pt" style:font-size-complex="10pt"/>
    </style:style>
    <style:style style:name="P93" style:family="paragraph" style:parent-style-name="Text_20_body">
      <style:text-properties fo:font-size="10pt" officeooo:rsid="007e4d67" officeooo:paragraph-rsid="007e4d67" style:font-size-asian="10pt" style:font-size-complex="10pt"/>
    </style:style>
    <style:style style:name="P94" style:family="paragraph" style:parent-style-name="Text_20_body">
      <style:text-properties fo:font-size="10pt" officeooo:rsid="007167dc" officeooo:paragraph-rsid="007167dc" style:font-size-asian="10pt" style:font-size-complex="10pt"/>
    </style:style>
    <style:style style:name="P95" style:family="paragraph" style:parent-style-name="Text_20_body">
      <style:text-properties fo:color="#0000cc" loext:opacity="100%" fo:font-size="10pt" officeooo:rsid="00735edf" officeooo:paragraph-rsid="00735edf" style:font-size-asian="10pt" style:font-size-complex="10pt"/>
    </style:style>
    <style:style style:name="P96" style:family="paragraph" style:parent-style-name="Text_20_body">
      <style:text-properties officeooo:paragraph-rsid="007c3e5b"/>
    </style:style>
    <style:style style:name="P97" style:family="paragraph" style:parent-style-name="Standard">
      <style:text-properties fo:font-size="10pt" fo:font-weight="normal" officeooo:rsid="002df9af" officeooo:paragraph-rsid="00735edf" style:font-size-asian="10pt" style:font-weight-asian="normal" style:font-size-complex="10pt" style:font-weight-complex="normal"/>
    </style:style>
    <style:style style:name="P98" style:family="paragraph" style:parent-style-name="Standard">
      <style:text-properties fo:color="#0000cc" loext:opacity="100%" fo:font-size="10pt" fo:font-weight="normal" officeooo:rsid="00735edf" officeooo:paragraph-rsid="00735edf" style:font-size-asian="10pt" style:font-weight-asian="normal" style:font-size-complex="10pt" style:font-weight-complex="normal"/>
    </style:style>
    <style:style style:name="P99" style:family="paragraph" style:parent-style-name="Standard">
      <style:text-properties fo:font-size="10pt" fo:font-weight="normal" officeooo:rsid="002f3ef6" officeooo:paragraph-rsid="0073c21b" style:font-size-asian="10pt" style:font-weight-asian="normal" style:font-size-complex="10pt" style:font-weight-complex="normal"/>
    </style:style>
    <style:style style:name="P100" style:family="paragraph" style:parent-style-name="Standard">
      <style:text-properties fo:color="#ff3333" loext:opacity="100%" fo:font-size="10pt" fo:font-weight="normal" officeooo:rsid="00735edf" officeooo:paragraph-rsid="00735edf" style:font-size-asian="10pt" style:font-weight-asian="normal" style:font-size-complex="10pt" style:font-weight-complex="normal"/>
    </style:style>
    <style:style style:name="P101" style:family="paragraph" style:parent-style-name="Standard">
      <style:text-properties fo:font-size="10pt" fo:font-weight="normal" officeooo:rsid="006a4294" officeooo:paragraph-rsid="006a4294" style:font-size-asian="10pt" style:font-weight-asian="normal" style:font-size-complex="10pt" style:font-weight-complex="normal"/>
    </style:style>
    <style:style style:name="P102" style:family="paragraph" style:parent-style-name="Standard">
      <style:text-properties fo:font-size="10pt" fo:font-weight="normal" officeooo:rsid="002f3ef6" officeooo:paragraph-rsid="0050a67e" style:font-size-asian="10pt" style:font-weight-asian="normal" style:font-size-complex="10pt" style:font-weight-complex="normal"/>
    </style:style>
    <style:style style:name="P103" style:family="paragraph" style:parent-style-name="Standard">
      <style:text-properties fo:font-size="12pt" fo:font-weight="bold" officeooo:rsid="0039313c" officeooo:paragraph-rsid="002df9af" style:font-size-asian="12pt" style:font-weight-asian="bold" style:font-size-complex="12pt" style:font-weight-complex="bold"/>
    </style:style>
    <style:style style:name="P104" style:family="paragraph" style:parent-style-name="Standard">
      <style:text-properties fo:font-size="12pt" fo:font-weight="bold" officeooo:rsid="0039313c" officeooo:paragraph-rsid="0039313c" style:font-size-asian="12pt" style:font-weight-asian="bold" style:font-size-complex="12pt" style:font-weight-complex="bold"/>
    </style:style>
    <style:style style:name="P105" style:family="paragraph" style:parent-style-name="Standard">
      <style:text-properties fo:font-size="10pt" fo:font-weight="normal" officeooo:rsid="0023507a" officeooo:paragraph-rsid="00212441" style:font-size-asian="10pt" style:font-weight-asian="normal" style:font-size-complex="10pt" style:font-weight-complex="normal"/>
    </style:style>
    <style:style style:name="P106" style:family="paragraph" style:parent-style-name="Standard">
      <style:text-properties fo:font-size="10pt" fo:font-weight="normal" officeooo:rsid="0039313c" officeooo:paragraph-rsid="0039313c" style:font-size-asian="10pt" style:font-weight-asian="normal" style:font-size-complex="10pt" style:font-weight-complex="normal"/>
    </style:style>
    <style:style style:name="P107" style:family="paragraph" style:parent-style-name="Standard">
      <style:text-properties fo:font-size="10pt" fo:font-weight="normal" officeooo:rsid="002d4a56" officeooo:paragraph-rsid="0039313c" style:font-size-asian="10pt" style:font-weight-asian="normal" style:font-size-complex="10pt" style:font-weight-complex="normal"/>
    </style:style>
    <style:style style:name="P108" style:family="paragraph" style:parent-style-name="Standard">
      <style:text-properties fo:font-size="12pt" fo:font-weight="bold" officeooo:rsid="003b22f9" officeooo:paragraph-rsid="0039313c" style:font-size-asian="12pt" style:font-weight-asian="bold" style:font-size-complex="12pt" style:font-weight-complex="bold"/>
    </style:style>
    <style:style style:name="P109" style:family="paragraph" style:parent-style-name="Standard">
      <style:text-properties fo:font-size="12pt" fo:font-weight="bold" officeooo:rsid="003b22f9" officeooo:paragraph-rsid="003b22f9" style:font-size-asian="12pt" style:font-weight-asian="bold" style:font-size-complex="12pt" style:font-weight-complex="bold"/>
    </style:style>
    <style:style style:name="P110" style:family="paragraph" style:parent-style-name="Standard">
      <style:text-properties fo:font-size="10pt" fo:font-weight="bold" officeooo:rsid="003b22f9" officeooo:paragraph-rsid="003b22f9" style:font-size-asian="8.75pt" style:font-weight-asian="bold" style:font-size-complex="10pt" style:font-weight-complex="bold"/>
    </style:style>
    <style:style style:name="P111" style:family="paragraph" style:parent-style-name="Standard">
      <style:text-properties fo:font-size="10pt" fo:font-weight="normal" officeooo:rsid="00513ee7" officeooo:paragraph-rsid="00513ee7" style:font-size-asian="10pt" style:font-weight-asian="normal" style:font-size-complex="10pt" style:font-weight-complex="normal"/>
    </style:style>
    <style:style style:name="P112" style:family="paragraph" style:parent-style-name="Standard">
      <style:text-properties fo:font-size="10pt" fo:font-weight="normal" officeooo:rsid="002d4a56" officeooo:paragraph-rsid="003b22f9" style:font-size-asian="10pt" style:font-weight-asian="normal" style:font-size-complex="10pt" style:font-weight-complex="normal"/>
    </style:style>
    <style:style style:name="P113" style:family="paragraph" style:parent-style-name="Standard">
      <style:text-properties fo:font-size="10pt" fo:font-weight="normal" officeooo:rsid="003b22f9" officeooo:paragraph-rsid="003b22f9" style:font-size-asian="10pt" style:font-weight-asian="normal" style:font-size-complex="10pt" style:font-weight-complex="normal"/>
    </style:style>
    <style:style style:name="P114" style:family="paragraph" style:parent-style-name="Standard">
      <style:text-properties fo:font-size="10pt" fo:font-weight="normal" officeooo:rsid="003b22f9" officeooo:paragraph-rsid="003ca5ca" style:font-size-asian="10pt" style:font-weight-asian="normal" style:font-size-complex="10pt" style:font-weight-complex="normal"/>
    </style:style>
    <style:style style:name="P115" style:family="paragraph" style:parent-style-name="Standard">
      <style:text-properties fo:font-size="10pt" fo:font-weight="normal" officeooo:rsid="003b22f9" officeooo:paragraph-rsid="00513ee7" style:font-size-asian="10pt" style:font-weight-asian="normal" style:font-size-complex="10pt" style:font-weight-complex="normal"/>
    </style:style>
    <style:style style:name="P116" style:family="paragraph" style:parent-style-name="Standard">
      <style:text-properties fo:color="#ff3333" loext:opacity="100%" fo:font-size="10pt" fo:font-weight="normal" officeooo:rsid="00520991" officeooo:paragraph-rsid="00520991" style:font-size-asian="10pt" style:font-weight-asian="normal" style:font-size-complex="10pt" style:font-weight-complex="normal"/>
    </style:style>
    <style:style style:name="P117" style:family="paragraph" style:parent-style-name="Standard">
      <style:text-properties fo:font-size="12pt" fo:font-weight="bold" officeooo:rsid="003b22f9" officeooo:paragraph-rsid="003cbda3" style:font-size-asian="12pt" style:font-weight-asian="bold" style:font-size-complex="12pt" style:font-weight-complex="bold"/>
    </style:style>
    <style:style style:name="P118" style:family="paragraph" style:parent-style-name="Standard">
      <style:text-properties fo:font-size="10pt" fo:font-weight="normal" officeooo:rsid="002d4a56" officeooo:paragraph-rsid="003cbda3" style:font-size-asian="10pt" style:font-weight-asian="normal" style:font-size-complex="10pt" style:font-weight-complex="normal"/>
    </style:style>
    <style:style style:name="P119" style:family="paragraph" style:parent-style-name="Standard">
      <style:text-properties fo:font-size="10pt" fo:font-weight="normal" officeooo:rsid="003b22f9" officeooo:paragraph-rsid="003cbda3" style:font-size-asian="10pt" style:font-weight-asian="normal" style:font-size-complex="10pt" style:font-weight-complex="normal"/>
    </style:style>
    <style:style style:name="P120" style:family="paragraph" style:parent-style-name="Standard">
      <style:text-properties fo:color="#c9211e" loext:opacity="100%" fo:font-size="10pt" fo:font-weight="normal" officeooo:rsid="005b9583" officeooo:paragraph-rsid="003cbda3" style:font-size-asian="10pt" style:font-weight-asian="normal" style:font-size-complex="10pt" style:font-weight-complex="normal"/>
    </style:style>
    <style:style style:name="P121" style:family="paragraph" style:parent-style-name="Standard">
      <style:text-properties fo:font-size="10pt" fo:font-weight="normal" officeooo:rsid="003cbda3" officeooo:paragraph-rsid="003cbda3" style:font-size-asian="10pt" style:font-weight-asian="normal" style:font-size-complex="10pt" style:font-weight-complex="normal"/>
    </style:style>
    <style:style style:name="P122" style:family="paragraph" style:parent-style-name="Standard">
      <style:text-properties fo:color="#ff3333" loext:opacity="100%" fo:font-size="10pt" fo:font-weight="normal" officeooo:rsid="003cbda3" officeooo:paragraph-rsid="003cbda3" style:font-size-asian="10pt" style:font-weight-asian="normal" style:font-size-complex="10pt" style:font-weight-complex="normal"/>
    </style:style>
    <style:style style:name="P123" style:family="paragraph" style:parent-style-name="Standard">
      <style:text-properties fo:color="#000000" loext:opacity="100%" fo:font-size="10pt" fo:font-weight="normal" officeooo:rsid="003cbda3" officeooo:paragraph-rsid="003cbda3" style:font-size-asian="10pt" style:font-weight-asian="normal" style:font-size-complex="10pt" style:font-weight-complex="normal"/>
    </style:style>
    <style:style style:name="P124" style:family="paragraph" style:parent-style-name="Standard">
      <style:text-properties fo:font-size="10pt" fo:font-weight="normal" officeooo:rsid="003cbda3" officeooo:paragraph-rsid="0095ae76" style:font-size-asian="10pt" style:font-weight-asian="normal" style:font-size-complex="10pt" style:font-weight-complex="normal"/>
    </style:style>
    <style:style style:name="P125" style:family="paragraph" style:parent-style-name="Standard">
      <style:text-properties fo:color="#ff3333" loext:opacity="100%" fo:font-size="10pt" fo:font-weight="normal" officeooo:rsid="0053aca8" officeooo:paragraph-rsid="0053aca8" style:font-size-asian="10pt" style:font-weight-asian="normal" style:font-size-complex="10pt" style:font-weight-complex="normal"/>
    </style:style>
    <style:style style:name="P126" style:family="paragraph" style:parent-style-name="Standard">
      <style:text-properties fo:color="#ff3333" loext:opacity="100%" fo:font-size="10pt" fo:font-weight="normal" officeooo:rsid="0053aca8" officeooo:paragraph-rsid="005b9583" style:font-size-asian="10pt" style:font-weight-asian="normal" style:font-size-complex="10pt" style:font-weight-complex="normal"/>
    </style:style>
    <style:style style:name="P127" style:family="paragraph" style:parent-style-name="Standard">
      <style:text-properties fo:color="#000000" loext:opacity="100%" fo:font-size="10pt" fo:font-weight="normal" officeooo:rsid="00555f4b" officeooo:paragraph-rsid="005b9583" style:font-size-asian="10pt" style:font-weight-asian="normal" style:font-size-complex="10pt" style:font-weight-complex="normal"/>
    </style:style>
    <style:style style:name="P128" style:family="paragraph" style:parent-style-name="Standard">
      <style:text-properties fo:color="#ff3333" loext:opacity="100%" fo:font-size="10pt" fo:font-weight="normal" officeooo:rsid="0053aca8" officeooo:paragraph-rsid="00555f4b" style:font-size-asian="10pt" style:font-weight-asian="normal" style:font-size-complex="10pt" style:font-weight-complex="normal"/>
    </style:style>
    <style:style style:name="P129" style:family="paragraph" style:parent-style-name="Standard">
      <style:text-properties fo:font-size="10pt" fo:font-weight="normal" officeooo:rsid="003cbda3" officeooo:paragraph-rsid="003eb042" style:font-size-asian="10pt" style:font-weight-asian="normal" style:font-size-complex="10pt" style:font-weight-complex="normal"/>
    </style:style>
    <style:style style:name="P130" style:family="paragraph" style:parent-style-name="Standard">
      <style:text-properties fo:font-size="12pt" fo:font-weight="bold" officeooo:rsid="003fc18a" officeooo:paragraph-rsid="003fc18a" style:font-size-asian="12pt" style:font-weight-asian="bold" style:font-size-complex="12pt" style:font-weight-complex="bold"/>
    </style:style>
    <style:style style:name="P131" style:family="paragraph" style:parent-style-name="Standard">
      <style:text-properties fo:font-size="10pt" fo:font-weight="normal" officeooo:rsid="003fc18a" officeooo:paragraph-rsid="003fc18a" style:font-size-asian="8.75pt" style:font-weight-asian="normal" style:font-size-complex="10pt" style:font-weight-complex="normal"/>
    </style:style>
    <style:style style:name="P132" style:family="paragraph" style:parent-style-name="Standard">
      <style:text-properties fo:font-size="12pt" fo:font-weight="bold" officeooo:rsid="00555f4b" officeooo:paragraph-rsid="005ecd1f" style:font-size-asian="12pt" style:font-weight-asian="bold" style:font-size-complex="12pt" style:font-weight-complex="bold"/>
    </style:style>
    <style:style style:name="P133" style:family="paragraph" style:parent-style-name="Preformatted_20_Text">
      <style:text-properties fo:font-size="10pt" officeooo:paragraph-rsid="005ecd1f" style:font-size-asian="10pt" style:font-size-complex="10pt"/>
    </style:style>
    <style:style style:name="P134" style:family="paragraph" style:parent-style-name="Standard">
      <style:text-properties fo:font-size="10pt" fo:font-weight="normal" officeooo:rsid="003cbda3" officeooo:paragraph-rsid="005ecd1f" style:font-size-asian="10pt" style:font-weight-asian="normal" style:font-size-complex="10pt" style:font-weight-complex="normal"/>
    </style:style>
    <style:style style:name="P135" style:family="paragraph" style:parent-style-name="Standard">
      <style:text-properties fo:font-size="12pt" fo:font-weight="bold" officeooo:rsid="003fc18a" officeooo:paragraph-rsid="00555f4b" style:font-size-asian="12pt" style:font-weight-asian="bold" style:font-size-complex="12pt" style:font-weight-complex="bold"/>
    </style:style>
    <style:style style:name="P136" style:family="paragraph" style:parent-style-name="Standard">
      <style:text-properties fo:font-size="10pt" fo:font-weight="bold" officeooo:rsid="003fc18a" officeooo:paragraph-rsid="00555f4b" style:font-size-asian="8.75pt" style:font-weight-asian="bold" style:font-size-complex="10pt" style:font-weight-complex="bold"/>
    </style:style>
    <style:style style:name="P137" style:family="paragraph" style:parent-style-name="Standard">
      <style:text-properties fo:font-size="10pt" fo:font-weight="normal" officeooo:rsid="004098b1" officeooo:paragraph-rsid="00555f4b" style:font-size-asian="8.75pt" style:font-weight-asian="normal" style:font-size-complex="10pt" style:font-weight-complex="normal"/>
    </style:style>
    <style:style style:name="P138" style:family="paragraph" style:parent-style-name="Standard">
      <style:text-properties style:font-name="monospace" fo:font-size="10pt" fo:font-weight="normal" officeooo:rsid="004098b1" officeooo:paragraph-rsid="00555f4b" style:font-size-asian="8.75pt" style:font-weight-asian="normal" style:font-size-complex="10pt" style:font-weight-complex="normal"/>
    </style:style>
    <style:style style:name="P139" style:family="paragraph" style:parent-style-name="Standard">
      <style:text-properties style:font-name="monospace" fo:font-size="10pt" fo:font-weight="normal" officeooo:rsid="0040d8e5" officeooo:paragraph-rsid="00555f4b" style:font-size-asian="8.75pt" style:font-weight-asian="normal" style:font-size-complex="10pt" style:font-weight-complex="normal"/>
    </style:style>
    <style:style style:name="P140" style:family="paragraph" style:parent-style-name="Standard">
      <style:text-properties style:font-name="Liberation Serif" fo:font-size="10pt" fo:font-weight="normal" officeooo:rsid="0040d8e5" officeooo:paragraph-rsid="00555f4b" style:font-size-asian="8.75pt" style:font-weight-asian="normal" style:font-size-complex="10pt" style:font-weight-complex="normal"/>
    </style:style>
    <style:style style:name="P141" style:family="paragraph" style:parent-style-name="Standard">
      <style:text-properties style:font-name="Liberation Serif" fo:font-size="10pt" fo:font-weight="normal" officeooo:rsid="00419144" officeooo:paragraph-rsid="00555f4b" style:font-size-asian="8.75pt" style:font-weight-asian="normal" style:font-size-complex="10pt" style:font-weight-complex="normal"/>
    </style:style>
    <style:style style:name="P142" style:family="paragraph" style:parent-style-name="Standard">
      <style:text-properties style:font-name="monospace1" fo:font-size="6pt" fo:font-weight="normal" officeooo:rsid="00419144" officeooo:paragraph-rsid="00555f4b" style:font-size-asian="6pt" style:font-weight-asian="normal" style:font-size-complex="6pt" style:font-weight-complex="normal"/>
    </style:style>
    <style:style style:name="P143" style:family="paragraph" style:parent-style-name="Standard">
      <style:text-properties style:font-name="Liberation Serif" fo:font-size="10pt" fo:font-weight="normal" officeooo:rsid="00437012" officeooo:paragraph-rsid="00555f4b" style:font-size-asian="8.75pt" style:font-weight-asian="normal" style:font-size-complex="10pt" style:font-weight-complex="normal"/>
    </style:style>
    <style:style style:name="P144" style:family="paragraph" style:parent-style-name="Standard">
      <style:text-properties style:font-name="Liberation Serif" fo:font-size="10pt" fo:font-style="italic" fo:font-weight="normal" officeooo:rsid="00555f4b" officeooo:paragraph-rsid="00555f4b" style:font-size-asian="8.75pt" style:font-style-asian="italic" style:font-weight-asian="normal" style:font-size-complex="10pt" style:font-style-complex="italic" style:font-weight-complex="normal"/>
    </style:style>
    <style:style style:name="P145" style:family="paragraph" style:parent-style-name="Standard">
      <style:text-properties fo:font-size="10pt" fo:font-weight="bold" officeooo:rsid="003fc18a" officeooo:paragraph-rsid="003fc18a" style:font-size-asian="10pt" style:font-weight-asian="bold" style:font-size-complex="10pt" style:font-weight-complex="bold"/>
    </style:style>
    <style:style style:name="P146" style:family="paragraph" style:parent-style-name="Heading_20_3">
      <style:text-properties fo:font-size="10pt" fo:font-weight="normal" officeooo:rsid="0024f22e" officeooo:paragraph-rsid="0023507a" style:font-size-asian="10pt" style:font-weight-asian="normal" style:font-size-complex="10pt" style:font-weight-complex="normal"/>
    </style:style>
    <style:style style:name="P147" style:family="paragraph" style:parent-style-name="Text_20_body">
      <style:text-properties fo:font-size="10pt" style:font-size-asian="10pt" style:font-size-complex="10pt"/>
    </style:style>
    <style:style style:name="P148" style:family="paragraph" style:parent-style-name="Preformatted_20_Text">
      <style:text-properties fo:font-size="10pt" style:font-size-asian="10pt" style:font-size-complex="10pt"/>
    </style:style>
    <style:style style:name="P149" style:family="paragraph" style:parent-style-name="Preformatted_20_Text">
      <style:text-properties fo:font-size="10pt" officeooo:paragraph-rsid="0058eefa" style:font-size-asian="10pt" style:font-size-complex="10pt"/>
    </style:style>
    <style:style style:name="P150" style:family="paragraph" style:parent-style-name="Standard">
      <style:text-properties fo:font-size="12pt" fo:font-weight="bold" officeooo:rsid="003fc18a" officeooo:paragraph-rsid="004098b1" style:font-size-asian="12pt" style:font-weight-asian="bold" style:font-size-complex="12pt" style:font-weight-complex="bold"/>
    </style:style>
    <style:style style:name="P151" style:family="paragraph" style:parent-style-name="Standard">
      <style:text-properties fo:font-size="12pt" fo:font-weight="bold" officeooo:rsid="003fc18a" officeooo:paragraph-rsid="005f1433" style:font-size-asian="12pt" style:font-weight-asian="bold" style:font-size-complex="12pt" style:font-weight-complex="bold"/>
    </style:style>
    <style:style style:name="P152" style:family="paragraph" style:parent-style-name="Standard">
      <style:text-properties fo:font-size="12pt" fo:font-weight="bold" officeooo:rsid="003fc18a" officeooo:paragraph-rsid="00602337" style:font-size-asian="12pt" style:font-weight-asian="bold" style:font-size-complex="12pt" style:font-weight-complex="bold"/>
    </style:style>
    <style:style style:name="P153" style:family="paragraph" style:parent-style-name="Standard">
      <style:text-properties fo:font-size="12pt" fo:font-weight="bold" officeooo:rsid="003fc18a" officeooo:paragraph-rsid="00756b4b" style:font-size-asian="12pt" style:font-weight-asian="bold" style:font-size-complex="12pt" style:font-weight-complex="bold"/>
    </style:style>
    <style:style style:name="P154" style:family="paragraph" style:parent-style-name="Standard">
      <style:text-properties fo:font-size="12pt" fo:font-weight="bold" officeooo:rsid="003fc18a" officeooo:paragraph-rsid="0078cc22" style:font-size-asian="12pt" style:font-weight-asian="bold" style:font-size-complex="12pt" style:font-weight-complex="bold"/>
    </style:style>
    <style:style style:name="P155" style:family="paragraph" style:parent-style-name="Standard">
      <style:text-properties fo:font-size="12pt" fo:font-weight="bold" officeooo:rsid="003fc18a" officeooo:paragraph-rsid="007908a3" style:font-size-asian="12pt" style:font-weight-asian="bold" style:font-size-complex="12pt" style:font-weight-complex="bold"/>
    </style:style>
    <style:style style:name="P156" style:family="paragraph" style:parent-style-name="Standard">
      <style:text-properties fo:font-size="12pt" fo:font-weight="bold" officeooo:rsid="003fc18a" officeooo:paragraph-rsid="007a9f85" style:font-size-asian="12pt" style:font-weight-asian="bold" style:font-size-complex="12pt" style:font-weight-complex="bold"/>
    </style:style>
    <style:style style:name="T1" style:family="text">
      <style:text-properties officeooo:rsid="001a83d4"/>
    </style:style>
    <style:style style:name="T2" style:family="text">
      <style:text-properties officeooo:rsid="005b9583"/>
    </style:style>
    <style:style style:name="T3" style:family="text">
      <style:text-properties officeooo:rsid="0029e62c"/>
    </style:style>
    <style:style style:name="T4" style:family="text">
      <style:text-properties officeooo:rsid="007f8019"/>
    </style:style>
    <style:style style:name="T5" style:family="text">
      <style:text-properties officeooo:rsid="00878cd4"/>
    </style:style>
    <style:style style:name="T6" style:family="text">
      <style:text-properties officeooo:rsid="00276bc3"/>
    </style:style>
    <style:style style:name="T7" style:family="text">
      <style:text-properties officeooo:rsid="001c1dcc"/>
    </style:style>
    <style:style style:name="T8" style:family="text">
      <style:text-properties officeooo:rsid="001c2cd0"/>
    </style:style>
    <style:style style:name="T9" style:family="text">
      <style:text-properties officeooo:rsid="00901403"/>
    </style:style>
    <style:style style:name="T10" style:family="text">
      <style:text-properties officeooo:rsid="008e9236"/>
    </style:style>
    <style:style style:name="T11" style:family="text">
      <style:text-properties officeooo:rsid="00915da8"/>
    </style:style>
    <style:style style:name="T12" style:family="text">
      <style:text-properties officeooo:rsid="008901bf"/>
    </style:style>
    <style:style style:name="T13" style:family="text">
      <style:text-properties officeooo:rsid="0058eefa"/>
    </style:style>
    <style:style style:name="T14" style:family="text">
      <style:text-properties officeooo:rsid="00212441"/>
    </style:style>
    <style:style style:name="T15" style:family="text">
      <style:text-properties fo:font-style="italic" style:font-style-asian="italic" style:font-style-complex="italic"/>
    </style:style>
    <style:style style:name="T16" style:family="text">
      <style:text-properties officeooo:rsid="002bcc83"/>
    </style:style>
    <style:style style:name="T17" style:family="text">
      <style:text-properties officeooo:rsid="001cf21c"/>
    </style:style>
    <style:style style:name="T18" style:family="text">
      <style:text-properties officeooo:rsid="002c9885"/>
    </style:style>
    <style:style style:name="T19" style:family="text">
      <style:text-properties officeooo:rsid="001f8a32"/>
    </style:style>
    <style:style style:name="T20" style:family="text">
      <style:text-properties fo:font-weight="normal" style:font-weight-asian="normal" style:font-weight-complex="normal"/>
    </style:style>
    <style:style style:name="T21" style:family="text">
      <style:text-properties fo:font-weight="normal" officeooo:rsid="001e886b" style:font-weight-asian="normal" style:font-weight-complex="normal"/>
    </style:style>
    <style:style style:name="T22" style:family="text">
      <style:text-properties fo:font-size="10pt" officeooo:rsid="001e886b" style:font-size-asian="10pt" style:font-size-complex="10pt"/>
    </style:style>
    <style:style style:name="T23" style:family="text">
      <style:text-properties fo:font-size="10pt" officeooo:rsid="001f8a32" style:font-size-asian="10pt" style:font-size-complex="10pt"/>
    </style:style>
    <style:style style:name="T24" style:family="text">
      <style:text-properties fo:font-size="10pt" officeooo:rsid="002bcc83" style:font-size-asian="10pt" style:font-size-complex="10pt"/>
    </style:style>
    <style:style style:name="T25" style:family="text">
      <style:text-properties fo:font-size="10pt" officeooo:rsid="004af67c" style:font-size-asian="10pt" style:font-size-complex="10pt"/>
    </style:style>
    <style:style style:name="T26" style:family="text">
      <style:text-properties fo:font-size="10pt" fo:font-weight="normal" style:font-size-asian="10pt" style:font-weight-asian="normal" style:font-size-complex="10pt" style:font-weight-complex="normal"/>
    </style:style>
    <style:style style:name="T27" style:family="text">
      <style:text-properties fo:color="#6600ff" loext:opacity="100%" fo:font-size="10pt" officeooo:rsid="00215fcc" style:font-size-asian="10pt" style:font-size-complex="10pt"/>
    </style:style>
    <style:style style:name="T28" style:family="text">
      <style:text-properties fo:color="#6600ff" loext:opacity="100%" fo:font-size="10pt" officeooo:rsid="001f8a32" style:font-size-asian="10pt" style:font-size-complex="10pt"/>
    </style:style>
    <style:style style:name="T29" style:family="text">
      <style:text-properties fo:font-size="10pt" officeooo:rsid="00276bc3" style:font-size-asian="10pt" style:font-size-complex="10pt"/>
    </style:style>
    <style:style style:name="T30" style:family="text">
      <style:text-properties fo:font-size="10pt" officeooo:rsid="00878cd4" style:font-size-asian="10pt" style:font-size-complex="10pt"/>
    </style:style>
    <style:style style:name="T31" style:family="text">
      <style:text-properties fo:font-size="10pt" style:font-size-asian="10pt" style:font-size-complex="10pt"/>
    </style:style>
    <style:style style:name="T32" style:family="text">
      <style:text-properties fo:font-size="9pt" style:font-size-asian="9pt" style:font-size-complex="9pt"/>
    </style:style>
    <style:style style:name="T33" style:family="text">
      <style:text-properties fo:color="#6600ff" loext:opacity="100%"/>
    </style:style>
    <style:style style:name="T34" style:family="text">
      <style:text-properties fo:color="#6600ff" loext:opacity="100%" officeooo:rsid="00215fcc"/>
    </style:style>
    <style:style style:name="T35" style:family="text">
      <style:text-properties fo:color="#000000" loext:opacity="100%" officeooo:rsid="00215fcc"/>
    </style:style>
    <style:style style:name="T36" style:family="text">
      <style:text-properties fo:color="#000000" loext:opacity="100%" officeooo:rsid="002bcc83"/>
    </style:style>
    <style:style style:name="T37" style:family="text">
      <style:text-properties fo:color="#3333ff" loext:opacity="100%"/>
    </style:style>
    <style:style style:name="T38" style:family="text">
      <style:text-properties fo:color="#3333ff" loext:opacity="100%" fo:font-size="10pt" style:font-size-asian="10pt" style:font-size-complex="10pt"/>
    </style:style>
    <style:style style:name="T39" style:family="text">
      <style:text-properties fo:color="#000000" loext:opacity="100%" fo:font-size="10pt" style:font-size-asian="10pt" style:font-size-complex="10pt"/>
    </style:style>
    <style:style style:name="T40" style:family="text">
      <style:text-properties fo:color="#000000" loext:opacity="100%" fo:font-size="10pt" officeooo:rsid="009289df" style:font-size-asian="10pt" style:font-size-complex="10pt"/>
    </style:style>
    <style:style style:name="T41" style:family="text">
      <style:text-properties fo:color="#000000" loext:opacity="100%" fo:font-size="10pt" officeooo:rsid="00276bc3" style:font-size-asian="10pt" style:font-size-complex="10pt"/>
    </style:style>
    <style:style style:name="T42" style:family="text">
      <style:text-properties fo:color="#000000" loext:opacity="100%" fo:font-size="10pt" fo:font-weight="bold" officeooo:rsid="009289df" style:font-size-asian="10pt" style:font-weight-asian="bold" style:font-size-complex="10pt" style:font-weight-complex="bold"/>
    </style:style>
    <style:style style:name="T43" style:family="text">
      <style:text-properties officeooo:rsid="0093030d"/>
    </style:style>
    <style:style style:name="T44" style:family="text">
      <style:text-properties officeooo:rsid="009289df"/>
    </style:style>
    <style:style style:name="T45" style:family="text">
      <style:text-properties style:font-name="Luxi Mono" fo:font-size="8pt" officeooo:rsid="009289df" style:font-size-asian="8pt" style:font-size-complex="8pt"/>
    </style:style>
    <style:style style:name="T46" style:family="text">
      <style:text-properties style:font-name="Luxi Mono" fo:font-size="8pt" officeooo:rsid="0093030d" style:font-size-asian="8pt" style:font-size-complex="8pt"/>
    </style:style>
    <style:style style:name="T47" style:family="text">
      <style:text-properties style:font-name="Luxi Mono"/>
    </style:style>
    <style:style style:name="T48" style:family="text">
      <style:text-properties officeooo:rsid="001b9471"/>
    </style:style>
    <style:style style:name="T49" style:family="text">
      <style:text-properties officeooo:rsid="0094222a"/>
    </style:style>
    <style:style style:name="T50" style:family="text">
      <style:text-properties fo:font-size="10pt" fo:font-weight="normal" officeooo:rsid="001b9471" style:font-size-asian="10pt" style:font-weight-asian="normal" style:font-size-complex="10pt" style:font-weight-complex="normal"/>
    </style:style>
    <style:style style:name="T51" style:family="text">
      <style:text-properties officeooo:rsid="00948f6b"/>
    </style:style>
    <style:style style:name="T52" style:family="text">
      <style:text-properties fo:font-weight="bold" style:font-weight-asian="bold" style:font-weight-complex="bold"/>
    </style:style>
    <style:style style:name="T53" style:family="text">
      <style:text-properties officeooo:rsid="00689614"/>
    </style:style>
    <style:style style:name="T54" style:family="text">
      <style:text-properties fo:color="#c9211e" loext:opacity="100%"/>
    </style:style>
    <style:style style:name="T55" style:family="text">
      <style:text-properties officeooo:rsid="0095ae76"/>
    </style:style>
    <style:style style:name="T56" style:family="text">
      <style:text-properties fo:color="#000000" loext:opacity="100%" officeooo:rsid="002df9af"/>
    </style:style>
    <style:style style:name="T57" style:family="text">
      <style:text-properties officeooo:rsid="0023507a"/>
    </style:style>
    <style:style style:name="T58" style:family="text">
      <style:text-properties fo:color="#c9211e" loext:opacity="100%" officeooo:rsid="0050a67e"/>
    </style:style>
    <style:style style:name="T59" style:family="text">
      <style:text-properties officeooo:rsid="00215fcc"/>
    </style:style>
    <style:style style:name="T60" style:family="text">
      <style:text-properties officeooo:rsid="008ad6fe"/>
    </style:style>
    <style:style style:name="T61" style:family="text">
      <style:text-properties officeooo:rsid="00288d8f"/>
    </style:style>
    <style:style style:name="T62" style:family="text">
      <style:text-properties officeooo:rsid="004f4e60"/>
    </style:style>
    <style:style style:name="T63" style:family="text">
      <style:text-properties officeooo:rsid="004dcadd"/>
    </style:style>
    <style:style style:name="T64" style:family="text">
      <style:text-properties fo:font-weight="bold" officeooo:rsid="004f4e60" style:font-weight-asian="bold" style:font-weight-complex="bold"/>
    </style:style>
    <style:style style:name="T65" style:family="text">
      <style:text-properties officeooo:rsid="004de974"/>
    </style:style>
    <style:style style:name="T66" style:family="text">
      <style:text-properties fo:color="#000000" loext:opacity="100%" officeooo:rsid="004f4e60"/>
    </style:style>
    <style:style style:name="T67" style:family="text">
      <style:text-properties fo:color="#c9211e" loext:opacity="100%" officeooo:rsid="0058eefa"/>
    </style:style>
    <style:style style:name="T68" style:family="text">
      <style:text-properties fo:color="#c9211e" loext:opacity="100%" officeooo:rsid="005f1433"/>
    </style:style>
    <style:style style:name="T69" style:family="text">
      <style:text-properties officeooo:rsid="002df9af"/>
    </style:style>
    <style:style style:name="T70" style:family="text">
      <style:text-properties fo:color="#c9211e" loext:opacity="100%" officeooo:rsid="002df9af"/>
    </style:style>
    <style:style style:name="T71" style:family="text">
      <style:text-properties officeooo:rsid="007c3e5b"/>
    </style:style>
    <style:style style:name="T72" style:family="text">
      <style:text-properties officeooo:rsid="006b5ced"/>
    </style:style>
    <style:style style:name="T73" style:family="text">
      <style:text-properties officeooo:rsid="0035b102"/>
    </style:style>
    <style:style style:name="T74" style:family="text">
      <style:text-properties fo:color="#c9211e" loext:opacity="100%" officeooo:rsid="002ee270"/>
    </style:style>
    <style:style style:name="T75" style:family="text">
      <style:text-properties fo:color="#000000" loext:opacity="100%" officeooo:rsid="002ee270"/>
    </style:style>
    <style:style style:name="T76" style:family="text">
      <style:text-properties fo:color="#000000" loext:opacity="100%" officeooo:rsid="00735edf"/>
    </style:style>
    <style:style style:name="T77" style:family="text">
      <style:text-properties fo:color="#000000" loext:opacity="100%" officeooo:rsid="0023507a"/>
    </style:style>
    <style:style style:name="T78" style:family="text">
      <style:text-properties fo:color="#000000" loext:opacity="100%" officeooo:rsid="00374478"/>
    </style:style>
    <style:style style:name="T79" style:family="text">
      <style:text-properties fo:color="#ff3333" loext:opacity="100%" officeooo:rsid="002ee270"/>
    </style:style>
    <style:style style:name="T80" style:family="text">
      <style:text-properties fo:color="#ff3333" loext:opacity="100%" officeooo:rsid="00819fec"/>
    </style:style>
    <style:style style:name="T81" style:family="text">
      <style:text-properties officeooo:rsid="002ee270"/>
    </style:style>
    <style:style style:name="T82" style:family="text">
      <style:text-properties fo:color="#000000" loext:opacity="100%" officeooo:rsid="00819fec"/>
    </style:style>
    <style:style style:name="T83" style:family="text">
      <style:text-properties officeooo:rsid="00819fec"/>
    </style:style>
    <style:style style:name="T84" style:family="text">
      <style:text-properties fo:color="#c9211e" loext:opacity="100%" fo:font-size="10pt" fo:font-weight="normal" style:font-size-asian="10pt" style:font-weight-asian="normal" style:font-size-complex="10pt" style:font-weight-complex="normal"/>
    </style:style>
    <style:style style:name="T85" style:family="text">
      <style:text-properties fo:color="#c9211e" loext:opacity="100%" fo:font-size="10pt" fo:font-weight="normal" officeooo:rsid="007f8019" style:font-size-asian="10pt" style:font-weight-asian="normal" style:font-size-complex="10pt" style:font-weight-complex="normal"/>
    </style:style>
    <style:style style:name="T86" style:family="text">
      <style:text-properties fo:color="#c9211e" loext:opacity="100%" fo:font-size="10pt" fo:font-weight="normal" officeooo:rsid="00812015" style:font-size-asian="10pt" style:font-weight-asian="normal" style:font-size-complex="10pt" style:font-weight-complex="normal"/>
    </style:style>
    <style:style style:name="T87" style:family="text">
      <style:text-properties fo:font-size="10pt" fo:font-weight="normal" officeooo:rsid="0023507a" style:font-size-asian="10pt" style:font-weight-asian="normal" style:font-size-complex="10pt" style:font-weight-complex="normal"/>
    </style:style>
    <style:style style:name="T88" style:family="text">
      <style:text-properties fo:font-size="10pt" fo:font-weight="normal" officeooo:rsid="007f8019" style:font-size-asian="10pt" style:font-weight-asian="normal" style:font-size-complex="10pt" style:font-weight-complex="normal"/>
    </style:style>
    <style:style style:name="T89" style:family="text">
      <style:text-properties fo:font-size="10pt" fo:font-weight="normal" officeooo:rsid="00812015" style:font-size-asian="10pt" style:font-weight-asian="normal" style:font-size-complex="10pt" style:font-weight-complex="normal"/>
    </style:style>
    <style:style style:name="T90" style:family="text">
      <style:text-properties style:font-name="Luxi Mono" fo:font-size="8pt" fo:font-style="italic" fo:font-weight="normal" officeooo:rsid="007f8019" style:font-size-asian="8pt" style:font-style-asian="italic" style:font-weight-asian="normal" style:font-size-complex="8pt" style:font-style-complex="italic" style:font-weight-complex="normal"/>
    </style:style>
    <style:style style:name="T91" style:family="text">
      <style:text-properties style:font-name="Luxi Mono" fo:font-size="8pt" fo:font-style="italic" fo:font-weight="normal" officeooo:rsid="00857de5" style:font-size-asian="8pt" style:font-style-asian="italic" style:font-weight-asian="normal" style:font-size-complex="8pt" style:font-style-complex="italic" style:font-weight-complex="normal"/>
    </style:style>
    <style:style style:name="T92" style:family="text">
      <style:text-properties fo:color="#c9211e" loext:opacity="100%" officeooo:rsid="007f8019"/>
    </style:style>
    <style:style style:name="T93" style:family="text">
      <style:text-properties fo:color="#c9211e" loext:opacity="100%" officeooo:rsid="00812015"/>
    </style:style>
    <style:style style:name="T94" style:family="text">
      <style:text-properties fo:color="#c9211e" loext:opacity="100%" officeooo:rsid="0023507a"/>
    </style:style>
    <style:style style:name="T95" style:family="text">
      <style:text-properties fo:color="#000000" loext:opacity="100%" officeooo:rsid="007f8019"/>
    </style:style>
    <style:style style:name="T96" style:family="text">
      <style:text-properties fo:color="#000000" loext:opacity="100%" fo:font-weight="bold" officeooo:rsid="007f8019" style:font-weight-asian="bold" style:font-weight-complex="bold"/>
    </style:style>
    <style:style style:name="T97" style:family="text">
      <style:text-properties fo:color="#000000" loext:opacity="100%" officeooo:rsid="00805ea4"/>
    </style:style>
    <style:style style:name="T98" style:family="text">
      <style:text-properties fo:color="#000000" loext:opacity="100%" fo:font-style="italic" officeooo:rsid="00805ea4" style:font-style-asian="italic" style:font-style-complex="italic"/>
    </style:style>
    <style:style style:name="T99" style:family="text">
      <style:text-properties fo:color="#000000" loext:opacity="100%" fo:font-style="italic" officeooo:rsid="00894bba" style:font-style-asian="italic" style:font-style-complex="italic"/>
    </style:style>
    <style:style style:name="T100" style:family="text">
      <style:text-properties fo:color="#000000" loext:opacity="100%" officeooo:rsid="0031ee46"/>
    </style:style>
    <style:style style:name="T101" style:family="text">
      <style:text-properties fo:color="#000000" loext:opacity="100%" officeooo:rsid="00288d8f"/>
    </style:style>
    <style:style style:name="T102" style:family="text">
      <style:text-properties fo:color="#000000" loext:opacity="100%" officeooo:rsid="004dcadd"/>
    </style:style>
    <style:style style:name="T103" style:family="text">
      <style:text-properties fo:color="#000000" loext:opacity="100%" officeooo:rsid="002d4a56"/>
    </style:style>
    <style:style style:name="T104" style:family="text">
      <style:text-properties fo:color="#000000" loext:opacity="100%" fo:font-weight="bold" officeooo:rsid="004f4e60" style:font-weight-asian="bold" style:font-weight-complex="bold"/>
    </style:style>
    <style:style style:name="T105" style:family="text">
      <style:text-properties fo:color="#000000" loext:opacity="100%" officeooo:rsid="004de974"/>
    </style:style>
    <style:style style:name="T106" style:family="text">
      <style:text-properties fo:color="#c9211e" loext:opacity="100%" officeooo:rsid="00300be3"/>
    </style:style>
    <style:style style:name="T107" style:family="text">
      <style:text-properties fo:color="#000000" loext:opacity="100%" fo:font-weight="bold" officeooo:rsid="006c0fec" style:font-weight-asian="bold" style:font-weight-complex="bold"/>
    </style:style>
    <style:style style:name="T108" style:family="text">
      <style:text-properties fo:color="#000000" loext:opacity="100%" officeooo:rsid="006c0fec"/>
    </style:style>
    <style:style style:name="T109" style:family="text">
      <style:text-properties officeooo:rsid="00735edf"/>
    </style:style>
    <style:style style:name="T110" style:family="text">
      <style:text-properties style:font-name="Luxi Mono" fo:font-size="8pt" fo:font-style="italic" style:font-size-asian="8pt" style:font-style-asian="italic" style:font-size-complex="8pt" style:font-style-complex="italic"/>
    </style:style>
    <style:style style:name="T111" style:family="text">
      <style:text-properties fo:font-size="10pt" fo:font-weight="normal" officeooo:rsid="00805ea4" style:font-size-asian="10pt" style:font-weight-asian="normal" style:font-size-complex="10pt" style:font-weight-complex="normal"/>
    </style:style>
    <style:style style:name="T112" style:family="text">
      <style:text-properties fo:color="#0000cc" loext:opacity="100%" officeooo:rsid="006cf84c"/>
    </style:style>
    <style:style style:name="T113" style:family="text">
      <style:text-properties fo:color="#0000cc" loext:opacity="100%" officeooo:rsid="0023507a"/>
    </style:style>
    <style:style style:name="T114" style:family="text">
      <style:text-properties officeooo:rsid="00374478"/>
    </style:style>
    <style:style style:name="T115" style:family="text">
      <style:text-properties officeooo:rsid="006cf84c"/>
    </style:style>
    <style:style style:name="T116" style:family="text">
      <style:text-properties fo:color="#ff3333" loext:opacity="100%"/>
    </style:style>
    <style:style style:name="T117" style:family="text">
      <style:text-properties fo:color="#000000" loext:opacity="100%"/>
    </style:style>
    <style:style style:name="T118" style:family="text">
      <style:text-properties fo:color="#000000" loext:opacity="100%" officeooo:rsid="00878cd4"/>
    </style:style>
    <style:style style:name="T119" style:family="text">
      <style:text-properties fo:color="#ff3333" loext:opacity="100%" officeooo:rsid="0023507a"/>
    </style:style>
    <style:style style:name="T120" style:family="text">
      <style:text-properties fo:color="#000000" loext:opacity="100%" officeooo:rsid="008bc938"/>
    </style:style>
    <style:style style:name="T121" style:family="text">
      <style:text-properties officeooo:rsid="006e7d89"/>
    </style:style>
    <style:style style:name="T122" style:family="text">
      <style:text-properties fo:color="#ff3333" loext:opacity="100%" fo:font-weight="normal" officeooo:rsid="007167dc" style:font-weight-asian="normal" style:font-weight-complex="normal"/>
    </style:style>
    <style:style style:name="T123" style:family="text">
      <style:text-properties fo:color="#ff3333" loext:opacity="100%" fo:font-weight="normal" officeooo:rsid="00812015" style:font-weight-asian="normal" style:font-weight-complex="normal"/>
    </style:style>
    <style:style style:name="T124" style:family="text">
      <style:text-properties fo:color="#000000" loext:opacity="100%" fo:font-weight="normal" officeooo:rsid="007167dc" style:font-weight-asian="normal" style:font-weight-complex="normal"/>
    </style:style>
    <style:style style:name="T125" style:family="text">
      <style:text-properties fo:color="#000000" loext:opacity="100%" fo:font-weight="normal" officeooo:rsid="0023507a" style:font-weight-asian="normal" style:font-weight-complex="normal"/>
    </style:style>
    <style:style style:name="T126" style:family="text">
      <style:text-properties fo:color="#ff3333" loext:opacity="100%" officeooo:rsid="00812015"/>
    </style:style>
    <style:style style:name="T127" style:family="text">
      <style:text-properties fo:color="#000000" loext:opacity="100%" officeooo:rsid="00812015"/>
    </style:style>
    <style:style style:name="T128" style:family="text">
      <style:text-properties officeooo:rsid="00812015"/>
    </style:style>
    <style:style style:name="T129" style:family="text">
      <style:text-properties fo:color="#0000cc" loext:opacity="100%" fo:font-size="10pt" officeooo:rsid="00735edf" style:font-size-asian="10pt" style:font-size-complex="10pt"/>
    </style:style>
    <style:style style:name="T130" style:family="text">
      <style:text-properties fo:color="#c9211e" loext:opacity="100%" fo:font-size="10pt" fo:font-weight="normal" officeooo:rsid="002ee270" style:font-size-asian="10pt" style:font-weight-asian="normal" style:font-size-complex="10pt" style:font-weight-complex="normal"/>
    </style:style>
    <style:style style:name="T131" style:family="text">
      <style:text-properties fo:color="#000000" loext:opacity="100%" fo:font-size="10pt" fo:font-weight="normal" officeooo:rsid="002ee270" style:font-size-asian="10pt" style:font-weight-asian="normal" style:font-size-complex="10pt" style:font-weight-complex="normal"/>
    </style:style>
    <style:style style:name="T132" style:family="text">
      <style:text-properties fo:color="#000000" loext:opacity="100%" fo:font-size="10pt" fo:font-weight="normal" officeooo:rsid="00878cd4" style:font-size-asian="10pt" style:font-weight-asian="normal" style:font-size-complex="10pt" style:font-weight-complex="normal"/>
    </style:style>
    <style:style style:name="T133" style:family="text">
      <style:text-properties fo:color="#000000" loext:opacity="100%" fo:font-size="10pt" fo:font-weight="normal" officeooo:rsid="007c3e5b" style:font-size-asian="10pt" style:font-weight-asian="normal" style:font-size-complex="10pt" style:font-weight-complex="normal"/>
    </style:style>
    <style:style style:name="T134" style:family="text">
      <style:text-properties fo:color="#000000" loext:opacity="100%" fo:font-size="10pt" fo:font-weight="normal" officeooo:rsid="0023507a" style:font-size-asian="10pt" style:font-weight-asian="normal" style:font-size-complex="10pt" style:font-weight-complex="normal"/>
    </style:style>
    <style:style style:name="T135" style:family="text">
      <style:text-properties fo:color="#000000" loext:opacity="100%" officeooo:rsid="0073c21b"/>
    </style:style>
    <style:style style:name="T136" style:family="text">
      <style:text-properties fo:color="#c9211e" loext:opacity="100%" officeooo:rsid="0073c21b"/>
    </style:style>
    <style:style style:name="T137" style:family="text">
      <style:text-properties fo:color="#c9211e" loext:opacity="100%" officeooo:rsid="006a4294"/>
    </style:style>
    <style:style style:name="T138" style:family="text">
      <style:text-properties officeooo:rsid="0031ee46"/>
    </style:style>
    <style:style style:name="T139" style:family="text">
      <style:text-properties fo:color="#000000" loext:opacity="100%" officeooo:rsid="002f3ef6"/>
    </style:style>
    <style:style style:name="T140" style:family="text">
      <style:text-properties fo:color="#000000" loext:opacity="100%" fo:font-style="italic" fo:font-weight="bold" style:font-style-asian="italic" style:font-weight-asian="bold" style:font-style-complex="italic" style:font-weight-complex="bold"/>
    </style:style>
    <style:style style:name="T141" style:family="text">
      <style:text-properties fo:color="#ff3333" loext:opacity="100%" officeooo:rsid="0031ee46"/>
    </style:style>
    <style:style style:name="T142" style:family="text">
      <style:text-properties fo:color="#000000" loext:opacity="100%" officeooo:rsid="00490e43"/>
    </style:style>
    <style:style style:name="T143" style:family="text">
      <style:text-properties fo:color="#000000" loext:opacity="100%" officeooo:rsid="0050a67e"/>
    </style:style>
    <style:style style:name="T144" style:family="text">
      <style:text-properties fo:color="#c9211e" loext:opacity="100%" officeooo:rsid="00490e43"/>
    </style:style>
    <style:style style:name="T145" style:family="text">
      <style:text-properties officeooo:rsid="009699e7"/>
    </style:style>
    <style:style style:name="T146" style:family="text">
      <style:text-properties fo:color="#c9211e" loext:opacity="100%" officeooo:rsid="0039313c"/>
    </style:style>
    <style:style style:name="T147" style:family="text">
      <style:text-properties officeooo:rsid="0039313c"/>
    </style:style>
    <style:style style:name="T148" style:family="text">
      <style:text-properties fo:font-style="italic" officeooo:rsid="005d5ff9" style:font-style-asian="italic" style:font-style-complex="italic"/>
    </style:style>
    <style:style style:name="T149" style:family="text">
      <style:text-properties officeooo:rsid="005d5ff9"/>
    </style:style>
    <style:style style:name="T150" style:family="text">
      <style:text-properties fo:color="#000000" loext:opacity="100%" officeooo:rsid="003b22f9"/>
    </style:style>
    <style:style style:name="T151" style:family="text">
      <style:text-properties fo:color="#c9211e" loext:opacity="100%" officeooo:rsid="003b22f9"/>
    </style:style>
    <style:style style:name="T152" style:family="text">
      <style:text-properties officeooo:rsid="003b22f9"/>
    </style:style>
    <style:style style:name="T153" style:family="text">
      <style:text-properties officeooo:rsid="00520991"/>
    </style:style>
    <style:style style:name="T154" style:family="text">
      <style:text-properties fo:color="#c9211e" loext:opacity="100%" officeooo:rsid="004f4e60"/>
    </style:style>
    <style:style style:name="T155" style:family="text">
      <style:text-properties fo:color="#000000" loext:opacity="100%" officeooo:rsid="004ff150"/>
    </style:style>
    <style:style style:name="T156" style:family="text">
      <style:text-properties fo:color="#000000" loext:opacity="100%" fo:font-weight="bold" officeooo:rsid="003b22f9" style:font-weight-asian="bold" style:font-weight-complex="bold"/>
    </style:style>
    <style:style style:name="T157" style:family="text">
      <style:text-properties fo:color="#000000" loext:opacity="100%" officeooo:rsid="005d5ff9"/>
    </style:style>
    <style:style style:name="T158" style:family="text">
      <style:text-properties fo:color="#ff3333" loext:opacity="100%" officeooo:rsid="004f4e60"/>
    </style:style>
    <style:style style:name="T159" style:family="text">
      <style:text-properties fo:color="#c9211e" loext:opacity="100%" officeooo:rsid="00513ee7"/>
    </style:style>
    <style:style style:name="T160" style:family="text">
      <style:text-properties fo:color="#000000" loext:opacity="100%" officeooo:rsid="003ca5ca"/>
    </style:style>
    <style:style style:name="T161" style:family="text">
      <style:text-properties fo:color="#c9211e" loext:opacity="100%" officeooo:rsid="003ca5ca"/>
    </style:style>
    <style:style style:name="T162" style:family="text">
      <style:text-properties fo:color="#000000" loext:opacity="100%" officeooo:rsid="00513ee7"/>
    </style:style>
    <style:style style:name="T163" style:family="text">
      <style:text-properties fo:color="#000000" loext:opacity="100%" officeooo:rsid="00520991"/>
    </style:style>
    <style:style style:name="T164" style:family="text">
      <style:text-properties fo:color="#c9211e" loext:opacity="100%" officeooo:rsid="00878cd4"/>
    </style:style>
    <style:style style:name="T165" style:family="text">
      <style:text-properties officeooo:rsid="003ca5ca"/>
    </style:style>
    <style:style style:name="T166" style:family="text">
      <style:text-properties officeooo:rsid="003cbda3"/>
    </style:style>
    <style:style style:name="T167" style:family="text">
      <style:text-properties officeooo:rsid="0053aca8"/>
    </style:style>
    <style:style style:name="T168" style:family="text">
      <style:text-properties fo:color="#c9211e" loext:opacity="100%" officeooo:rsid="003cbda3"/>
    </style:style>
    <style:style style:name="T169" style:family="text">
      <style:text-properties fo:color="#000000" loext:opacity="100%" officeooo:rsid="003cbda3"/>
    </style:style>
    <style:style style:name="T170" style:family="text">
      <style:text-properties fo:color="#c9211e" loext:opacity="100%" officeooo:rsid="005b9583"/>
    </style:style>
    <style:style style:name="T171" style:family="text">
      <style:text-properties fo:color="#000000" loext:opacity="100%" officeooo:rsid="005b9583"/>
    </style:style>
    <style:style style:name="T172" style:family="text">
      <style:text-properties fo:color="#ff3333" loext:opacity="100%" officeooo:rsid="0095ae76"/>
    </style:style>
    <style:style style:name="T173" style:family="text">
      <style:text-properties fo:color="#ff3333" loext:opacity="100%" officeooo:rsid="00878cd4"/>
    </style:style>
    <style:style style:name="T174" style:family="text">
      <style:text-properties officeooo:rsid="00555f4b"/>
    </style:style>
    <style:style style:name="T175" style:family="text">
      <style:text-properties fo:color="#000000" loext:opacity="100%" officeooo:rsid="00555f4b"/>
    </style:style>
    <style:style style:name="T176" style:family="text">
      <style:text-properties fo:color="#000000" loext:opacity="100%" officeooo:rsid="0095ae76"/>
    </style:style>
    <style:style style:name="T177" style:family="text">
      <style:text-properties fo:color="#000000" loext:opacity="100%" officeooo:rsid="003eb042"/>
    </style:style>
    <style:style style:name="T178" style:family="text">
      <style:text-properties officeooo:rsid="0042aa26"/>
    </style:style>
    <style:style style:name="T179" style:family="text">
      <style:text-properties style:font-name="Liberation Serif" officeooo:rsid="00555f4b"/>
    </style:style>
    <style:style style:name="T180" style:family="text">
      <style:text-properties style:font-name="Liberation Serif" fo:font-weight="bold" officeooo:rsid="0056a4d5" style:font-weight-asian="bold" style:font-weight-complex="bold"/>
    </style:style>
    <style:style style:name="T181" style:family="text">
      <style:text-properties fo:color="#ff3333" loext:opacity="100%" style:font-name="Liberation Serif" officeooo:rsid="00555f4b"/>
    </style:style>
    <style:style style:name="T182" style:family="text">
      <style:text-properties fo:color="#ff3333" loext:opacity="100%" style:font-name="Liberation Serif"/>
    </style:style>
    <style:style style:name="T183" style:family="text">
      <style:text-properties fo:color="#000000" loext:opacity="100%" style:font-name="Liberation Serif" officeooo:rsid="00555f4b"/>
    </style:style>
    <style:style style:name="T184" style:family="text">
      <style:text-properties fo:color="#000000" loext:opacity="100%" style:font-name="Liberation Serif" officeooo:rsid="0056a4d5"/>
    </style:style>
    <style:style style:name="T185" style:family="text">
      <style:text-properties fo:color="#000000" loext:opacity="100%" style:font-name="Liberation Serif" officeooo:rsid="005ecd1f"/>
    </style:style>
    <style:style style:name="T186" style:family="text">
      <style:text-properties fo:color="#000000" loext:opacity="100%" style:font-name="Liberation Serif" officeooo:rsid="0086c889"/>
    </style:style>
    <style:style style:name="T187" style:family="text">
      <style:text-properties fo:color="#ff3333" loext:opacity="100%" style:font-name="Liberation Serif" officeooo:rsid="0056a4d5"/>
    </style:style>
    <style:style style:name="T188" style:family="text">
      <style:text-properties fo:color="#000000" loext:opacity="100%" style:font-name="Liberation Serif" officeooo:rsid="0058eefa"/>
    </style:style>
    <style:style style:name="T189" style:family="text">
      <style:text-properties fo:color="#000000" loext:opacity="100%" style:font-name="Liberation Serif" fo:font-weight="bold" officeooo:rsid="0056a4d5" style:font-weight-asian="bold" style:font-weight-complex="bold"/>
    </style:style>
    <style:style style:name="T190" style:family="text">
      <style:text-properties fo:color="#000000" loext:opacity="100%" style:font-name="Liberation Serif" fo:font-size="10pt" fo:font-weight="normal" officeooo:rsid="003cbda3" style:font-size-asian="10pt" style:font-weight-asian="normal" style:font-size-complex="10pt" style:font-weight-complex="normal"/>
    </style:style>
    <style:style style:name="T191" style:family="text">
      <style:text-properties officeooo:rsid="004098b1"/>
    </style:style>
    <style:style style:name="T192" style:family="text">
      <style:text-properties officeooo:rsid="005f1433"/>
    </style:style>
    <style:style style:name="T193" style:family="text">
      <style:text-properties fo:color="#000000" loext:opacity="100%" fo:font-size="8pt" fo:background-color="#ffffff" loext:char-shading-value="0" style:font-size-asian="8pt" style:font-size-complex="8pt"/>
    </style:style>
    <style:style style:name="T194" style:family="text">
      <style:text-properties fo:font-size="8pt" style:font-size-asian="8pt" style:font-size-complex="8pt"/>
    </style:style>
    <style:style style:name="T195" style:family="text">
      <style:text-properties fo:color="#1818b2" loext:opacity="100%" fo:font-size="8pt" fo:background-color="#18b218" loext:char-shading-value="0" style:font-size-asian="8pt" style:font-size-complex="8pt"/>
    </style:style>
    <style:style style:name="T196" style:family="text">
      <style:text-properties fo:color="#5454ff" loext:opacity="100%" fo:font-size="8pt" fo:background-color="#ffffff" loext:char-shading-value="0" style:font-size-asian="8pt" style:font-size-complex="8pt"/>
    </style:style>
    <style:style style:name="T197" style:family="text">
      <style:text-properties fo:color="#54ffff" loext:opacity="100%" fo:font-size="8pt" fo:background-color="#ffffff" loext:char-shading-value="0" style:font-size-asian="8pt" style:font-size-complex="8pt"/>
    </style:style>
    <style:style style:name="T198" style:family="text">
      <style:text-properties style:font-name="Liberation Serif"/>
    </style:style>
    <style:style style:name="T199" style:family="text">
      <style:text-properties style:font-name="Liberation Serif" officeooo:rsid="0040d8e5"/>
    </style:style>
    <style:style style:name="T200" style:family="text">
      <style:text-properties style:font-name="Liberation Serif" officeooo:rsid="00419144"/>
    </style:style>
    <style:style style:name="T201" style:family="text">
      <style:text-properties officeooo:rsid="0043ffb6"/>
    </style:style>
    <style:style style:name="T202" style:family="text">
      <style:text-properties officeooo:rsid="0045cb42"/>
    </style:style>
    <style:style style:name="T203" style:family="text">
      <style:text-properties fo:font-size="8pt" officeooo:rsid="0058eefa" style:font-size-asian="8pt" style:font-size-complex="8pt"/>
    </style:style>
    <style:style style:name="T204" style:family="text">
      <style:text-properties fo:font-size="8pt" officeooo:rsid="0042aa26" style:font-size-asian="8pt" style:font-size-complex="8pt"/>
    </style:style>
    <style:style style:name="T205" style:family="text">
      <style:text-properties fo:color="#000000" loext:opacity="100%" style:font-name="Liberation Serif" officeooo:rsid="005f1433"/>
    </style:style>
    <style:style style:name="T206" style:family="text">
      <style:text-properties fo:color="#000000" loext:opacity="100%" style:font-name="Liberation Serif" officeooo:rsid="00602337"/>
    </style:style>
    <style:style style:name="T207" style:family="text">
      <style:text-properties fo:color="#000000" loext:opacity="100%" style:font-name="Liberation Serif" fo:font-size="10pt" fo:font-weight="normal" officeooo:rsid="005f1433" style:font-size-asian="10pt" style:font-weight-asian="normal" style:font-size-complex="10pt" style:font-weight-complex="normal"/>
    </style:style>
    <style:style style:name="T208" style:family="text">
      <style:text-properties fo:color="#000000" loext:opacity="100%" style:font-name="Liberation Serif" fo:font-size="10pt" fo:font-weight="normal" officeooo:rsid="00602337" style:font-size-asian="10pt" style:font-weight-asian="normal" style:font-size-complex="10pt" style:font-weight-complex="normal"/>
    </style:style>
    <style:style style:name="T209" style:family="text">
      <style:text-properties fo:color="#000000" loext:opacity="100%" style:font-name="Liberation Serif" fo:font-size="10pt" fo:font-style="italic" fo:font-weight="normal" officeooo:rsid="00644247" style:font-size-asian="10pt" style:font-style-asian="italic" style:font-weight-asian="normal" style:font-size-complex="10pt" style:font-style-complex="italic" style:font-weight-complex="normal"/>
    </style:style>
    <style:style style:name="T210" style:family="text">
      <style:text-properties fo:color="#000000" loext:opacity="100%" style:font-name="Liberation Serif" fo:font-size="10pt" fo:font-style="italic" fo:font-weight="normal" officeooo:rsid="007e4d67" style:font-size-asian="10pt" style:font-style-asian="italic" style:font-weight-asian="normal" style:font-size-complex="10pt" style:font-style-complex="italic" style:font-weight-complex="normal"/>
    </style:style>
    <style:style style:name="T211" style:family="text">
      <style:text-properties fo:color="#000000" loext:opacity="100%" style:font-name="Liberation Serif" fo:font-size="10pt" fo:font-style="italic" fo:font-weight="normal" officeooo:rsid="00602337" style:font-size-asian="10pt" style:font-style-asian="italic" style:font-weight-asian="normal" style:font-size-complex="10pt" style:font-style-complex="italic" style:font-weight-complex="normal"/>
    </style:style>
    <style:style style:name="T212" style:family="text">
      <style:text-properties fo:color="#000000" loext:opacity="100%" style:font-name="Liberation Serif" fo:font-size="10pt" fo:font-weight="normal" officeooo:rsid="006387cc" style:font-size-asian="10pt" style:font-weight-asian="normal" style:font-size-complex="10pt" style:font-weight-complex="normal"/>
    </style:style>
    <style:style style:name="T213" style:family="text">
      <style:text-properties fo:color="#000000" loext:opacity="100%" style:font-name="Liberation Serif" fo:font-size="10pt" fo:font-weight="normal" officeooo:rsid="00878cd4" style:font-size-asian="10pt" style:font-weight-asian="normal" style:font-size-complex="10pt" style:font-weight-complex="normal"/>
    </style:style>
    <style:style style:name="T214" style:family="text">
      <style:text-properties fo:color="#000000" loext:opacity="100%" style:font-name="Liberation Serif" officeooo:rsid="00756b4b"/>
    </style:style>
    <style:style style:name="T215" style:family="text">
      <style:text-properties fo:color="#000000" loext:opacity="100%" style:font-name="Liberation Serif" fo:font-size="10pt" fo:font-weight="normal" officeooo:rsid="00756b4b" style:font-size-asian="8.75pt" style:font-weight-asian="normal" style:font-size-complex="10pt" style:font-weight-complex="normal"/>
    </style:style>
    <style:style style:name="T216" style:family="text">
      <style:text-properties fo:color="#000000" loext:opacity="100%" style:font-name="Liberation Serif" fo:font-size="10pt" officeooo:rsid="00756b4b" style:font-size-asian="8.75pt" style:font-size-complex="10pt"/>
    </style:style>
    <style:style style:name="T217" style:family="text">
      <style:text-properties fo:color="#000000" loext:opacity="100%" style:font-name="Liberation Serif" fo:font-size="10pt" officeooo:rsid="00756b4b" style:font-size-asian="10pt" style:font-size-complex="10pt"/>
    </style:style>
    <style:style style:name="T218" style:family="text">
      <style:text-properties fo:color="#000000" loext:opacity="100%" style:font-name="Liberation Serif" fo:font-size="10pt" fo:font-weight="normal" officeooo:rsid="00756b4b" style:font-size-asian="10pt" style:font-weight-asian="normal" style:font-size-complex="10pt" style:font-weight-complex="normal"/>
    </style:style>
    <style:style style:name="T219" style:family="text">
      <style:text-properties fo:color="#000000" loext:opacity="100%" style:font-name="Liberation Serif" fo:font-size="10pt" fo:font-weight="normal" officeooo:rsid="007c3e5b" style:font-size-asian="8.75pt" style:font-weight-asian="normal" style:font-size-complex="10pt" style:font-weight-complex="normal"/>
    </style:style>
    <style:style style:name="T220" style:family="text">
      <style:text-properties fo:color="#000000" loext:opacity="100%" style:font-name="Liberation Serif" fo:font-size="10pt" fo:font-weight="normal" officeooo:rsid="00773902" style:font-size-asian="8.75pt" style:font-weight-asian="normal" style:font-size-complex="10pt" style:font-weight-complex="normal"/>
    </style:style>
    <style:style style:name="T221" style:family="text">
      <style:text-properties fo:color="#000000" loext:opacity="100%" style:font-name="Liberation Serif" fo:font-size="10pt" fo:font-weight="normal" officeooo:rsid="0078cc22" style:font-size-asian="8.75pt" style:font-weight-asian="normal" style:font-size-complex="10pt" style:font-weight-complex="normal"/>
    </style:style>
    <style:style style:name="T222" style:family="text">
      <style:text-properties fo:color="#000000" loext:opacity="100%" style:font-name="Liberation Serif" fo:font-size="10pt" fo:font-weight="normal" officeooo:rsid="0078cc22" style:font-size-asian="10pt" style:font-weight-asian="normal" style:font-size-complex="10pt" style:font-weight-complex="normal"/>
    </style:style>
    <style:style style:name="T223" style:family="text">
      <style:text-properties fo:color="#000000" loext:opacity="100%" style:font-name="Liberation Serif" fo:font-size="10pt" officeooo:rsid="0078cc22" style:font-size-asian="8.75pt" style:font-size-complex="10pt"/>
    </style:style>
    <style:style style:name="T224" style:family="text">
      <style:text-properties fo:color="#000000" loext:opacity="100%" style:font-name="Liberation Serif" fo:font-size="10pt" fo:font-weight="normal" officeooo:rsid="007908a3" style:font-size-asian="10pt" style:font-weight-asian="normal" style:font-size-complex="10pt" style:font-weight-complex="normal"/>
    </style:style>
    <style:style style:name="T225" style:family="text">
      <style:text-properties fo:color="#000000" loext:opacity="100%" style:font-name="Liberation Serif" fo:font-size="10pt" fo:font-weight="normal" officeooo:rsid="007908a3" style:font-size-asian="8.75pt" style:font-weight-asian="normal" style:font-size-complex="10pt" style:font-weight-complex="normal"/>
    </style:style>
    <style:style style:name="T226" style:family="text">
      <style:text-properties fo:color="#000000" loext:opacity="100%" style:font-name="Liberation Serif" fo:font-size="10pt" officeooo:rsid="007908a3" style:font-size-asian="8.75pt" style:font-size-complex="10pt"/>
    </style:style>
    <style:style style:name="T227" style:family="text">
      <style:text-properties fo:color="#000000" loext:opacity="100%" style:font-name="Liberation Serif" fo:font-size="12pt" fo:font-weight="bold" officeooo:rsid="003fc18a" style:font-size-asian="12pt" style:font-weight-asian="bold" style:font-size-complex="12pt" style:font-weight-complex="bold"/>
    </style:style>
    <style:style style:name="T228" style:family="text">
      <style:text-properties fo:color="#000000" loext:opacity="100%" style:font-name="Liberation Serif" fo:font-size="10pt" fo:font-weight="normal" officeooo:rsid="007a9f85" style:font-size-asian="10pt" style:font-weight-asian="normal" style:font-size-complex="10pt" style:font-weight-complex="normal"/>
    </style:style>
    <style:style style:name="T229" style:family="text">
      <style:text-properties fo:color="#000000" loext:opacity="100%" style:font-name="Liberation Serif" fo:font-size="10pt" fo:font-weight="normal" officeooo:rsid="007a9f85" style:font-size-asian="8.75pt" style:font-weight-asian="normal" style:font-size-complex="10pt" style:font-weight-complex="normal"/>
    </style:style>
    <style:style style:name="T230" style:family="text">
      <style:text-properties fo:color="#000000" loext:opacity="100%" style:font-name="Liberation Serif" fo:font-size="10pt" officeooo:rsid="007a9f85" style:font-size-asian="8.75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flow-with-text="tru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FreeFactory <text:span text:style-name="T1">QT</text:span></text:p>
      <text:p text:style-name="P2"/>
      <text:p text:style-name="P2">Documentation</text:p>
      <text:p text:style-name="P3"/>
      <text:p text:style-name="P4">by</text:p>
      <text:p text:style-name="P4"/>
      <text:p text:style-name="P4">J<text:span text:style-name="T2">ames</text:span> Hines and Karl Swisher</text:p>
      <text:p text:style-name="P5"/>
      <text:p text:style-name="P5"/>
      <text:p text:style-name="P6">Licensed under the GPLv3 2013, <text:span text:style-name="T3">2025-</text:span><text:span text:style-name="T4">2026</text:span></text:p>
      <text:p text:style-name="P3"><draw:frame draw:style-name="fr1" draw:name="Image1" text:anchor-type="char" svg:x="1.9264in" svg:y="0.1138in" svg:width="3.2398in" svg:height="2.9516in" draw:z-index="0"><draw:image xlink:href="Pictures/10000001000003A5000003527924A45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7"><text:soft-page-break/>Introduction</text:p>
      <text:p text:style-name="P8"/>
      <text:p text:style-name="P9">Welcome to FreeFactory. FreeFactory not just another front end for <text:span text:style-name="T5">FFM</text:span>peg, but one that fully encompasses the full <text:span text:style-name="T6">and rich</text:span> feature set of <text:span text:style-name="T5">FFM</text:span>peg. While not everything <text:span text:style-name="T5">FFmpeg</text:span> can theoretically do is represented in the user interface, it allows for manual commands or even manual additions to what is selectable within the GUI making it extremely powerful without <text:span text:style-name="T6">(many) </text:span>cumbersome command lines.</text:p>
      <text:p text:style-name="P10"/>
      <text:p text:style-name="P10"><text:span text:style-name="T7">FreeFactory has been around since 201</text:span><text:span text:style-name="T8">2</text:span><text:span text:style-name="T7"> and started its life as a collection of BASH scripts, with one watching over a “drop” folder waiting for files to arrive. When a file is dropped into a specified folder, the background process </text:span><text:span text:style-name="T8">(FreeFactoryConversion)</text:span><text:span text:style-name="T7"> picks it up and processes according to the factory settings for that folder then saves it into a specific output folder.</text:span></text:p>
      <text:p text:style-name="P10"/>
      <text:p text:style-name="P10"><text:span text:style-name="T7">Th</text:span><text:span text:style-name="T8">ese</text:span><text:span text:style-name="T7"> folders are specific to the type of </text:span><text:span text:style-name="T8">output </text:span><text:span text:style-name="T7">file you need </text:span><text:span text:style-name="T8">after</text:span><text:span text:style-name="T7"> conversion </text:span><text:span text:style-name="T6">and linked to a factory</text:span><text:span text:style-name="T7"> and </text:span><text:span text:style-name="T3">typically </text:span><text:span text:style-name="T7">look something like this:</text:span></text:p>
      <text:p text:style-name="P10">/<text:span text:style-name="T9">video</text:span><text:span text:style-name="T7">/</text:span><text:span text:style-name="T10">dropbox/</text:span></text:p>
      <text:p text:style-name="P10">/<text:span text:style-name="T9">video</text:span><text:span text:style-name="T7">/</text:span><text:span text:style-name="T10">dropbox/</text:span><text:span text:style-name="T7">to-flac</text:span><text:span text:style-name="T11">24</text:span></text:p>
      <text:p text:style-name="P11">/<text:span text:style-name="T9">video</text:span><text:span text:style-name="T7">/</text:span><text:span text:style-name="T10">dropbox/</text:span><text:span text:style-name="T7">to-mxf-with-captions</text:span></text:p>
      <text:p text:style-name="P11"><text:span text:style-name="T7">/</text:span><text:span text:style-name="T9">video</text:span><text:span text:style-name="T7">/</text:span><text:span text:style-name="T10">dropbox/</text:span><text:span text:style-name="T11">x264-10-bit</text:span><text:span text:style-name="T7"><text:line-break/>/</text:span><text:span text:style-name="T9">video</text:span><text:span text:style-name="T7">/</text:span><text:span text:style-name="T10">dropbox/</text:span><text:span text:style-name="T7">to-client</text:span><text:span text:style-name="T11">preview</text:span><text:span text:style-name="T7">-mp4</text:span></text:p>
      <text:p text:style-name="P10">/<text:span text:style-name="T9">video</text:span><text:span text:style-name="T3">/</text:span><text:span text:style-name="T10">dropbox/</text:span><text:span text:style-name="T3">dji-footage</text:span></text:p>
      <text:p text:style-name="P10"/>
      <text:p text:style-name="P9"><text:span text:style-name="T12">For</text:span> example, you have an audio file that needs converted to .flac, you simply drop one or more of the files into the to-flac folder and they are converted automatically for you to .flac and sent to whatever destination is assigned to that factory. The codec of the input file does not matter, as long as it <text:span text:style-name="T13">is </text:span>supported by <text:span text:style-name="T5">FFMpeg</text:span>, <text:span text:style-name="T8">which most are</text:span>. <text:span text:style-name="T14">These folders can be local or network folders.</text:span></text:p>
      <text:p text:style-name="P9"/>
      <text:p text:style-name="P12">In my case, I drop everything into the /video/dropbox/<text:span text:style-name="T15">anydropbox</text:span> and the rendered file outputs to /video. </text:p>
      <text:p text:style-name="P12"/>
      <text:p text:style-name="P13">In 2013, FreeFactory got its first frontend in the form of a collection of tcl/tk scripts which made building “factories” much easier than doing it by hand. With the exception of getting updated whenever TCL or TK libraries changed and broke things <text:span text:style-name="T16">and adding a manual options field</text:span>, it pretty much remained in this state until recently.</text:p>
      <text:p text:style-name="P14"><draw:frame draw:style-name="fr2" draw:name="Frame1" text:anchor-type="char" svg:x="0.1201in" svg:y="0.1098in" svg:width="3.8508in" draw:z-index="1"><draw:text-box fo:min-height="2.3992in"><text:p text:style-name="P15"><draw:frame draw:style-name="fr3" draw:name="Image2" text:anchor-type="paragraph" svg:width="3.8508in" style:rel-width="100%" svg:height="2.3992in" style:rel-height="scale" draw:z-index="2"><draw:image xlink:href="Pictures/10000000000003BD00000268DF263DDA.jpg" xlink:type="simple" xlink:show="embed" xlink:actuate="onLoad" draw:mime-type="image/jpeg"/></draw:frame>Figure <text:sequence text:ref-name="refFigure0" text:name="Figure" text:formula="ooow:Figure+1" style:num-format="1">1</text:sequence>: Original user interface using TCL-TK by Karl Swisher</text:p></draw:text-box></draw:frame></text:p>
      <text:p text:style-name="P14"/>
      <text:p text:style-name="P13">Jump to 2025. I was needing to add some new features to FreeFactory <text:span text:style-name="T16">for personal use </text:span>and found using TCL/TK a bit cumbersome and dated so we decided to rewrite it in Python3 using Q<text:span text:style-name="T13">t</text:span>6. <text:span text:style-name="T17">This allowed for easy UI creation (using Q</text:span><text:span text:style-name="T13">t</text:span><text:span text:style-name="T17">6-Designer) and saved lots of time and code. In fact, because FreeFactoryQT uses a .ui file for the GUI, users can modify and rearrange it to better suit their needs, if desired, without fear of breaking any python code. This assumes the user is familiar with the </text:span><text:span text:style-name="T13">Q</text:span><text:span text:style-name="T17">t6 </text:span><text:span text:style-name="T13">D</text:span><text:span text:style-name="T17">esigner </text:span><text:span text:style-name="T13">(Qt6)</text:span><text:span text:style-name="T17"> workflow. </text:span></text:p>
      <text:p text:style-name="P13"/>
      <text:p text:style-name="P16">While FreeFactory <text:span text:style-name="T18">can use</text:span> <text:span text:style-name="T19">a</text:span> <text:span text:style-name="T18">background </text:span><text:span text:style-name="T19">service</text:span> process to pick up files from folders <text:span text:style-name="T18">automatically </text:span>(it’s now a systemd service) it also <text:span text:style-name="T20">now supports direct drag and drop conversion without </text:span><text:span text:style-name="T21">requiring</text:span><text:span text:style-name="T20"> the background process at all! </text:span></text:p>
      <text:p text:style-name="P17"><text:soft-page-break/></text:p>
      <text:p text:style-name="P18"><text:span text:style-name="T22">It also newly supports Streaming Factories with a built in Strea</text:span><text:span text:style-name="T23">m Manager</text:span><text:span text:style-name="T22"> allowing one to create and stream multiple streams. </text:span><text:span text:style-name="T23">Of course streaming multiple streams is both CPU and/</text:span><text:span text:style-name="T24">or </text:span><text:span text:style-name="T23">GPU intensive so the amount of streams you can actually handle will greatly depend on the power of your hardware. Using your GPU is the way to go when doing this using codecs such as h264_nvenc and hevc_nvenc which leverage such hardware are good examples. </text:span><text:span text:style-name="T25">Also, if you run out of </text:span><text:span text:style-name="Strong_20_Emphasis"><text:span text:style-name="T26">NVENC session limit(s)</text:span></text:span> (or “NVENC encoders”)<text:span text:style-name="T25">, FreeFactory will automatically switch to libx264 for rendering. The Live Stream Manager tab also supports recording your video streams, or direct recording without streaming via the Mode switch (Stream|Record|Record and Stream).</text:span></text:p>
      <text:p text:style-name="P14"/>
      <text:p text:style-name="P19">Terminology</text:p>
      <text:p text:style-name="P20"><text:span text:style-name="T27">- </text:span><text:span text:style-name="T28">Factory:</text:span><text:span text:style-name="T23"> This is a small config file which the Factory Builder will generate for you. </text:span><text:span text:style-name="T29">It contains all the parameters necessary to create </text:span><text:span text:style-name="T24">a </text:span><text:span text:style-name="T29">command structure </text:span><text:span text:style-name="T30">FFMpeg</text:span><text:span text:style-name="T29"> can use. </text:span><text:span text:style-name="T31">The default location for user factories is </text:span><text:span text:style-name="Source_20_Text"><text:span text:style-name="T32">~/.local/share/FreeFactory/Factories</text:span></text:span><text:span text:style-name="T32">.</text:span><text:span text:style-name="T31"> This location can be changed in Global Settings.</text:span></text:p>
      <text:p text:style-name="P21"><text:span text:style-name="T33"/></text:p>
      <text:p text:style-name="P22"><text:span text:style-name="T33">- Streaming Factory:</text:span> This is the mostly the same as above but contains stream specific parameters that normal Factories do not.</text:p>
      <text:p text:style-name="P23"><text:span text:style-name="T34"/></text:p>
      <text:p text:style-name="P23"><text:span text:style-name="T34">- Drop Folder</text:span><text:span text:style-name="T33">: </text:span><text:span text:style-name="T35">You create drop folders for dropping media files into for a specific conversion Factory. These are ONLY used by the background service. They are not used </text:span><text:span text:style-name="T36">at all </text:span><text:span text:style-name="T35">for Direct Encoding.</text:span></text:p>
      <text:p text:style-name="P24"><text:span text:style-name="T37"/></text:p>
      <text:p text:style-name="P25"><text:span text:style-name="T38">- Direct Encoding:</text:span><text:span text:style-name="T39"> The FreeFactory front end will </text:span><text:span text:style-name="T40">encode directly without needing the</text:span><text:span text:style-name="T39"> background service. </text:span><text:span text:style-name="T41">It is a drag and drop function. </text:span><text:span text:style-name="T40">The rendered file will end up wherever you have </text:span><text:span text:style-name="T42">Output Directory</text:span><text:span text:style-name="T40"> assigned. You need to have write access to this directory.</text:span></text:p>
      <text:p text:style-name="P26"/>
      <text:p text:style-name="P27">Requirements:</text:p>
      <text:p text:style-name="P28">Python3</text:p>
      <text:p text:style-name="P28">PyQ<text:span text:style-name="T13">t</text:span>6</text:p>
      <text:p text:style-name="P29">FFMpeg v7.1+</text:p>
      <text:p text:style-name="P28">inotifywait (if using the <text:span text:style-name="T43">freefactory-notify.</text:span>service)</text:p>
      <text:p text:style-name="P28"/>
      <text:p text:style-name="P30">All requirements should be available via most Linux distribution’s package manager. PyQt6 can also be installed using pip.</text:p>
      <text:p text:style-name="P26"/>
      <text:p text:style-name="P31">Manual Installation:</text:p>
      <text:p text:style-name="P32">1. Download the .zip file from github.</text:p>
      <text:p text:style-name="P32"><text:span text:style-name="T44">(you can also run “</text:span><text:span text:style-name="T45">git clone </text:span><text:a xlink:type="simple" xlink:href="https://github.com/lacojim/FreeFactoryQT" text:style-name="Internet_20_link" text:visited-style-name="Visited_20_Internet_20_Link"><text:span text:style-name="T45">https://github.com/lacojim/FreeFactoryQT</text:span></text:a><text:span text:style-name="T45"> </text:span><text:span text:style-name="T46">FreeFactory</text:span><text:span text:style-name="T45">”)</text:span></text:p>
      <text:p text:style-name="P33">2. Create a folder in /opt called FreeFactory (it is case sensitive)</text:p>
      <text:p text:style-name="P33">3. Decompress the contents of the .zip file into /opt/FreeFactory/</text:p>
      <text:p text:style-name="P33">4. (Optional) Create a desktop <text:span text:style-name="T18">icon</text:span> using the /opt/FreeFactory/Pics/FreeFactoryQT.ico file. For the shortcut to work, add the command: <text:span text:style-name="T47">python3 /opt/FreeFactory/bin/main.py</text:span></text:p>
      <text:p text:style-name="P34"/>
      <text:p text:style-name="P35"><text:span text:style-name="T14">First Run and </text:span><text:span text:style-name="T48">Configuring</text:span> FreeFactory</text:p>
      <text:p text:style-name="P36"/>
      <text:p text:style-name="P37">Do not attempt to run FreeFactory as root user. Only the service <text:span text:style-name="T49">can</text:span> be ran as root (if needed, <text:span text:style-name="T49">but not recommended</text:span>).</text:p>
      <text:p text:style-name="P38"/>
      <text:p text:style-name="P39"><text:span text:style-name="T50">First, go to the Global Program Settings tab and simply click Save Settings on the bottom left. </text:span><text:span text:style-name="T31">This ensures that the FreeFactory configuration file is created in </text:span><text:span text:style-name="Source_20_Text"><text:span text:style-name="T31">~/.config/FreeFactory/.freefactoryrc</text:span></text:span><text:span text:style-name="T31">.</text:span><text:span text:style-name="T50"> The defaults here are fine for now for Linux installations. </text:span></text:p>
      <text:p text:style-name="P40"/>
      <text:p text:style-name="P41">You may fill in the Company Name if applicable and choose a default Factory here. This is the factory that you will commonly use the most <text:span text:style-name="T6">for </text:span><text:span text:style-name="T18">both </text:span><text:span text:style-name="T6">Direct </text:span><text:span text:style-name="T18">and Batch </text:span><text:span text:style-name="T6">Encoding</text:span>, if needed. This default Factory is for <text:span text:style-name="T49">Direct E</text:span>ncoding and has absolutely nothing to do with the <text:span text:style-name="T49">f</text:span>ree<text:span text:style-name="T49">f</text:span>actory-<text:span text:style-name="T49">n</text:span>otify.service. You can also change your Factories folder and the <text:span text:style-name="T49">PATH</text:span> to your <text:span text:style-name="T5">FFMpeg</text:span> install <text:span text:style-name="T18">if different than /usr/bin/</text:span>. </text:p>
      <text:p text:style-name="P41"/>
      <text:p text:style-name="P41"><text:soft-page-break/>You <draw:frame draw:style-name="fr1" draw:name="Image3" text:anchor-type="char" svg:x="0.0311in" svg:y="0.2819in" svg:width="3.4465in" svg:height="2.2374in" draw:z-index="3"><draw:image xlink:href="Pictures/100000000000044E000002EE03786703.png" xlink:type="simple" xlink:show="embed" xlink:actuate="onLoad" draw:mime-type="image/png"/></draw:frame>can also manage the <text:span text:style-name="T51">f</text:span>ree<text:span text:style-name="T51">f</text:span>actory-<text:span text:style-name="T51">n</text:span>otify.service from <text:span text:style-name="T51">the Global Program Settings tab</text:span>.</text:p>
      <text:p text:style-name="P42">Factory Builder Tab<text:line-break/></text:p>
      <text:p text:style-name="P43"><draw:frame draw:style-name="fr1" draw:name="Image4" text:anchor-type="char" svg:x="-0.0063in" svg:y="0in" svg:width="4.5417in" svg:height="3.1728in" draw:z-index="4"><draw:image xlink:href="Pictures/1000000100000456000003097FE29258.png" xlink:type="simple" xlink:show="embed" xlink:actuate="onLoad" draw:mime-type="image/png"/></draw:frame></text:p>
      <text:p text:style-name="P44"><text:span text:style-name="T52">TIP:</text:span> The radio boxes not only can be used to select items from the built-in list, you may also type in anything manually. I.e. You may want to use a codec that is not in the built-in codec list or a custom bitrate that is not available in the <text:span text:style-name="T53">combo </text:span>list. </text:p>
      <text:p text:style-name="P44"/>
      <text:p text:style-name="P45"><text:span text:style-name="T54">New Factory:</text:span> This clears all fields in preparation for building a new factory <text:span text:style-name="T55">and opens a dialog for Factory name, Output Directory and option Description. You MUST save the Factory once you have finished editing the fields.</text:span></text:p>
      <text:p text:style-name="P45"><text:span text:style-name="T54"/></text:p>
      <text:p text:style-name="P45"><text:span text:style-name="T54">Save Factory:</text:span> This saves the current factory to filename.</text:p>
      <text:p text:style-name="P45"><text:span text:style-name="T54"/></text:p>
      <text:p text:style-name="P45"><text:span text:style-name="T54">Delete Factory:</text:span> Deletes the currently selected factory.</text:p>
      <text:p text:style-name="P45"><text:span text:style-name="T54"/></text:p>
      <text:p text:style-name="P45"><text:span text:style-name="T54">Log Viewer:</text:span> Views logs generated by the FreeFactory-Service.</text:p>
      <text:p text:style-name="P45"><text:span text:style-name="T54"/></text:p>
      <text:p text:style-name="P45"><text:span text:style-name="T54">License viewer: </text:span><text:span text:style-name="T56">Views the GPLv3 license</text:span></text:p>
      <text:p text:style-name="P46"/>
      <text:p text:style-name="P46">About FreeFactory:</text:p>
      <text:p text:style-name="P45"><text:span text:style-name="T54"/></text:p>
      <text:p text:style-name="P45"><text:span text:style-name="T54">Factory List:</text:span> Contains a list of all your factories.</text:p>
      <text:p text:style-name="P45"><text:span text:style-name="T54"/></text:p>
      <text:p text:style-name="P45"><text:span text:style-name="T54">Factory Filename:</text:span> Name your factory here.</text:p>
      <text:p text:style-name="P47"><text:soft-page-break/><text:span text:style-name="T54"/></text:p>
      <text:p text:style-name="P47"><text:span text:style-name="T54">Factory Description:</text:span> Add a description for your factory here. <text:span text:style-name="T57">Be descriptive as once you get a lot of factories, it can avoid confusion.</text:span></text:p>
      <text:p text:style-name="P47"><text:span text:style-name="T58"/></text:p>
      <text:p text:style-name="P47"><text:span text:style-name="T58">N</text:span><text:span text:style-name="T54">otify Directory:</text:span> <text:span text:style-name="T59">If you are only planning to use FreeFactory for direct conversion, then you can ignore </text:span><text:span text:style-name="T57">this</text:span><text:span text:style-name="T59"> field completely. This will not apply to you. This is only used by the FreeFactoryConversion program which is r</text:span><text:span text:style-name="T60">u</text:span><text:span text:style-name="T59">n by FreeFactory-Notify.service. If you plan on using the Drop Folders, this field is a REQUIREMENT. </text:span></text:p>
      <text:p text:style-name="P45"><text:span text:style-name="T54"/></text:p>
      <text:p text:style-name="P45"><text:span text:style-name="T54">Output Directory:</text:span> This is the folder the factory will send you encoded file(s) to. It is used by both the GUI and the background FreeFactory service.</text:p>
      <text:p text:style-name="P48"><text:span text:style-name="T54"/></text:p>
      <text:p text:style-name="P49"/>
      <text:p text:style-name="P49"/>
      <text:p text:style-name="P49"/>
      <text:p text:style-name="P49"/>
      <text:p text:style-name="P49"/>
      <text:p text:style-name="P49"/>
      <text:p text:style-name="P49">Video Tab:</text:p>
      <text:p text:style-name="P49"><draw:frame draw:style-name="fr4" draw:name="Image16" text:anchor-type="char" svg:width="6.9252in" svg:height="1.9354in" draw:z-index="16"><draw:image xlink:href="Pictures/100000000000033D000000E57B72235A.png" xlink:type="simple" xlink:show="embed" xlink:actuate="onLoad" draw:mime-type="image/png"/></draw:frame></text:p>
      <text:p text:style-name="P49"/>
      <text:p text:style-name="P49"/>
      <text:p text:style-name="P48"><text:span text:style-name="T54">Video Codec:</text:span> <text:span text:style-name="T57">If the file you are converting is a video file, you must specify a Codec here. Select copy if you want to keep the original </text:span><text:span text:style-name="T61">codec </text:span><text:span text:style-name="T57">and simply change the </text:span><text:span text:style-name="T62">W</text:span><text:span text:style-name="T57">rapper/</text:span><text:span text:style-name="T62">Muxer</text:span><text:span text:style-name="T57">. As long as the codec is compatible with the wrapper, no other options are necessary</text:span><text:span text:style-name="T63">*</text:span><text:span text:style-name="T57">. Any fields left empty will simply default to the input file’s settings </text:span><text:span text:style-name="T61">except for this one</text:span><text:span text:style-name="T57">. </text:span>If the codec you need is not in the predefined list, you may type it in manually here. <text:span text:style-name="T57">(command line option is -c:v)</text:span></text:p>
      <text:p text:style-name="P50"><text:span text:style-name="T64"/></text:p>
      <text:p text:style-name="P50"><text:span text:style-name="T64">*IMPORTANT:</text:span><text:span text:style-name="T62"> </text:span><text:span text:style-name="T63">When selecting “copy” in the codec widget, all video options requir</text:span><text:span text:style-name="T65">ing</text:span><text:span text:style-name="T63"> rendering will be blanked and ghosted preventing one from entering invalid options. </text:span><text:span text:style-name="T66">This is because the codec “copy” is exclusive. If for example you would happen to have copy as the codec and a bitrate specified, copy is then ignored in favor of rendering because there is a bitrate specified. In this particular case, the original codec would be still maintained, but re-rendering would be forced with a new bitrate.</text:span></text:p>
      <text:p text:style-name="P45"><text:span text:style-name="T54"/></text:p>
      <text:p text:style-name="P45"><text:span text:style-name="T54">Video Size:</text:span> <text:span text:style-name="T57">Adjusts the output size or video resolution of the output file. </text:span>If the size you need is not in the predefined list, you may type it in manually here. <text:span text:style-name="T57">(command line option is -s)</text:span></text:p>
      <text:p text:style-name="P45"><text:span text:style-name="T54"/></text:p>
      <text:p text:style-name="P45"><text:span text:style-name="T54">Pix_Fmt </text:span><text:span text:style-name="T67">(pixel format)</text:span><text:span text:style-name="T54">:</text:span> This is the pixel format used for the codec. Not all pixel formats are compatible with all codecs. Use the <text:span text:style-name="T5">FFMpeg</text:span> Help tab for more info on specific pixel formats. You may also type in manually here if the p<text:span text:style-name="T13">ixel format </text:span>you need is not listed. <text:span text:style-name="T57">(command line option is -</text:span>pix_fmt<text:span text:style-name="T57">)</text:span></text:p>
      <text:p text:style-name="P45"><text:span text:style-name="T54"/></text:p>
      <text:p text:style-name="P45"><text:span text:style-name="T68">Muxer (Wrapper)</text:span><text:span text:style-name="T54">:</text:span> This will tell <text:span text:style-name="T5">FFMpeg</text:span> the <text:span text:style-name="T69">which wrapper to use for the </text:span>file type expected at the output. </text:p>
      <text:p text:style-name="P51"><text:span text:style-name="T70"/></text:p>
      <text:p text:style-name="P52"><text:span text:style-name="T70">P</text:span><text:span text:style-name="T54">rofile: </text:span></text:p>
      <text:p text:style-name="P52"><text:span text:style-name="T54"/></text:p>
      <text:p text:style-name="P53">Profile Level:</text:p>
      <text:p text:style-name="P51"><text:span text:style-name="T70"/></text:p>
      <text:p text:style-name="P51"><text:span text:style-name="T70">Video Bitrate:</text:span><text:span text:style-name="T69"> This sets the bitrate of the video encoding. </text:span><text:span text:style-name="T57">(command line option is -</text:span><text:span text:style-name="T69">b:v</text:span><text:span text:style-name="T57">)</text:span></text:p>
      <text:p text:style-name="P45"><text:soft-page-break/><text:span text:style-name="T70"/></text:p>
      <text:p text:style-name="P45"><text:span text:style-name="T70">Use Min/Max Bitrate:</text:span><text:span text:style-name="T69"> This locks the minrate and maxrate values and includes these fields in the FFm</text:span><text:span text:style-name="T71">e</text:span><text:span text:style-name="T69">pg command. </text:span><text:span text:style-name="T13">e.g.</text:span><text:span text:style-name="T69"> -b:v 50M -minrate 50M -maxrate 50M. </text:span><text:span text:style-name="T72">Mostly needed only in professional formats. </text:span></text:p>
      <text:p text:style-name="P47"><text:span text:style-name="T70"/></text:p>
      <text:p text:style-name="P47"><text:span text:style-name="T70">Video Frame Rate:</text:span><text:span text:style-name="T69"> Sets the framerate for encoding. </text:span><text:span text:style-name="T57">If left empty, it will use the frame rate of the input file. (command line option is -</text:span><text:span text:style-name="T69">r</text:span><text:span text:style-name="T57">)</text:span></text:p>
      <text:p text:style-name="P47"><text:span text:style-name="T70"/></text:p>
      <text:p text:style-name="P47"><text:span text:style-name="T70">Video Aspect Ratio:</text:span><text:span text:style-name="T69"> Sets the video aspect ratio. </text:span><text:span text:style-name="T57">If left empty, it will use the </text:span><text:span text:style-name="T73">aspect</text:span><text:span text:style-name="T57"> of the input file. (command line option is -</text:span><text:span text:style-name="T69">aspect</text:span><text:span text:style-name="T57">)</text:span></text:p>
      <text:p text:style-name="P54"><text:span text:style-name="T70"/></text:p>
      <text:p text:style-name="P55"><text:span text:style-name="T74">Video Presets: </text:span><text:span text:style-name="T75">Selects a Video Preset. </text:span><text:span text:style-name="T76">C</text:span><text:span text:style-name="T77">ommand line option is -</text:span><text:span text:style-name="T78">preset</text:span><text:span text:style-name="T77">:</text:span><text:span text:style-name="T76">v</text:span></text:p>
      <text:p text:style-name="P56"/>
      <text:p text:style-name="P57"><text:span text:style-name="T79">Video </text:span><text:span text:style-name="T80">Tags</text:span><text:span text:style-name="T79">:</text:span><text:span text:style-name="T81"> </text:span><text:span text:style-name="T82">This is mostly only useful for Apple compatibility. </text:span><text:span text:style-name="T76">C</text:span><text:span text:style-name="T77">ommand line option is -</text:span><text:span text:style-name="T82">tag</text:span><text:span text:style-name="T77">:</text:span><text:span text:style-name="T76">v</text:span></text:p>
      <text:p text:style-name="P58"/>
      <text:h text:style-name="P59" text:outline-level="2"/>
      <text:h text:style-name="P59" text:outline-level="2">Common <text:span text:style-name="Source_20_Text">-vtag</text:span> values</text:h>
      <text:p text:style-name="P60">Here are the most useful/common one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dec</text:p>
            </table:table-cell>
            <table:table-cell table:style-name="Table1.A1" office:value-type="string">
              <text:p text:style-name="Table_20_Heading">Typical vtag</text:p>
            </table:table-cell>
            <table:table-cell table:style-name="Table1.A1" office:value-type="string">
              <text:p text:style-name="Table_20_Heading">Notes</text:p>
            </table:table-cell>
          </table:table-row>
        </table:table-header-rows>
        <table:table-row>
          <table:table-cell table:style-name="Table1.A1" office:value-type="string">
            <text:p text:style-name="Table_20_Contents">H.264</text:p>
          </table:table-cell>
          <table:table-cell table:style-name="Table1.A1" office:value-type="string">
            <text:p text:style-name="Table_20_Contents"><text:span text:style-name="Source_20_Text">avc1</text:span></text:p>
          </table:table-cell>
          <table:table-cell table:style-name="Table1.A1" office:value-type="string">
            <text:p text:style-name="Table_20_Contents">Standard MP4/iOS H.264</text:p>
          </table:table-cell>
        </table:table-row>
        <table:table-row>
          <table:table-cell table:style-name="Table1.A1" office:value-type="string">
            <text:p text:style-name="Table_20_Contents">HEVC/H.265</text:p>
          </table:table-cell>
          <table:table-cell table:style-name="Table1.A1" office:value-type="string">
            <text:p text:style-name="Table_20_Contents"><text:span text:style-name="Source_20_Text">hvc1</text:span></text:p>
          </table:table-cell>
          <table:table-cell table:style-name="Table1.A1" office:value-type="string">
            <text:p text:style-name="Table_20_Contents">Preferred by Apple/iOS</text:p>
          </table:table-cell>
        </table:table-row>
        <table:table-row>
          <table:table-cell table:style-name="Table1.A1" office:value-type="string">
            <text:p text:style-name="Table_20_Contents">HEVC/H.265</text:p>
          </table:table-cell>
          <table:table-cell table:style-name="Table1.A1" office:value-type="string">
            <text:p text:style-name="Table_20_Contents"><text:span text:style-name="Source_20_Text">hev1</text:span></text:p>
          </table:table-cell>
          <table:table-cell table:style-name="Table1.A1" office:value-type="string">
            <text:p text:style-name="Table_20_Contents"><text:span text:style-name="T5">FFMpeg</text:span> often defaults to this</text:p>
          </table:table-cell>
        </table:table-row>
        <table:table-row>
          <table:table-cell table:style-name="Table1.A1" office:value-type="string">
            <text:p text:style-name="Table_20_Contents">MPEG-4 Part 2</text:p>
          </table:table-cell>
          <table:table-cell table:style-name="Table1.A1" office:value-type="string">
            <text:p text:style-name="Table_20_Contents"><text:span text:style-name="Source_20_Text">mp4v</text:span></text:p>
          </table:table-cell>
          <table:table-cell table:style-name="Table1.A1" office:value-type="string">
            <text:p text:style-name="Table_20_Contents">Old DivX/Xvid-style MPEG-4</text:p>
          </table:table-cell>
        </table:table-row>
        <table:table-row>
          <table:table-cell table:style-name="Table1.A1" office:value-type="string">
            <text:p text:style-name="Table_20_Contents">DV</text:p>
          </table:table-cell>
          <table:table-cell table:style-name="Table1.A1" office:value-type="string">
            <text:p text:style-name="Table_20_Contents"><text:span text:style-name="Source_20_Text">dvc </text:span>/ <text:span text:style-name="Source_20_Text">dvcp</text:span> / <text:span text:style-name="Source_20_Text">dvh5</text:span></text:p>
          </table:table-cell>
          <table:table-cell table:style-name="Table1.A1" office:value-type="string">
            <text:p text:style-name="Table_20_Contents">DV/DVCPro variants</text:p>
          </table:table-cell>
        </table:table-row>
        <table:table-row>
          <table:table-cell table:style-name="Table1.A1" office:value-type="string">
            <text:p text:style-name="Table_20_Contents">ProRes</text:p>
          </table:table-cell>
          <table:table-cell table:style-name="Table1.A1" office:value-type="string">
            <text:p text:style-name="Table_20_Contents"><text:span text:style-name="Source_20_Text">apcn</text:span>, <text:span text:style-name="Source_20_Text">apch</text:span>, <text:span text:style-name="Source_20_Text">ap4h</text:span>, <text:span text:style-name="Source_20_Text">apco</text:span></text:p>
          </table:table-cell>
          <table:table-cell table:style-name="Table1.A1" office:value-type="string">
            <text:p text:style-name="Table_20_Contents">Different ProRes profiles</text:p>
          </table:table-cell>
        </table:table-row>
        <table:table-row>
          <table:table-cell table:style-name="Table1.A1" office:value-type="string">
            <text:p text:style-name="Table_20_Contents">DNxHD/DNxHR</text:p>
          </table:table-cell>
          <table:table-cell table:style-name="Table1.A1" office:value-type="string">
            <text:p text:style-name="Table_20_Contents"><text:span text:style-name="Source_20_Text">AVdn</text:span></text:p>
          </table:table-cell>
          <table:table-cell table:style-name="Table1.A1" office:value-type="string">
            <text:p text:style-name="Table_20_Contents">Avid</text:p>
          </table:table-cell>
        </table:table-row>
        <table:table-row>
          <table:table-cell table:style-name="Table1.A1" office:value-type="string">
            <text:p text:style-name="Table_20_Contents">MJPEG</text:p>
          </table:table-cell>
          <table:table-cell table:style-name="Table1.A1" office:value-type="string">
            <text:p text:style-name="Table_20_Contents"><text:span text:style-name="Source_20_Text">mjpa</text:span> / <text:span text:style-name="Source_20_Text">jpeg</text:span></text:p>
          </table:table-cell>
          <table:table-cell table:style-name="Table1.A1" office:value-type="string">
            <text:p text:style-name="Table_20_Contents">MOV variants</text:p>
          </table:table-cell>
        </table:table-row>
        <table:table-row>
          <table:table-cell table:style-name="Table1.A1" office:value-type="string">
            <text:p text:style-name="Table_20_Contents">CineForm</text:p>
          </table:table-cell>
          <table:table-cell table:style-name="Table1.A1" office:value-type="string">
            <text:p text:style-name="Table_20_Contents"><text:span text:style-name="Source_20_Text">CFHD</text:span></text:p>
          </table:table-cell>
          <table:table-cell table:style-name="Table1.A1" office:value-type="string">
            <text:p text:style-name="Table_20_Contents">GoPro CineForm</text:p>
          </table:table-cell>
        </table:table-row>
        <table:table-row>
          <table:table-cell table:style-name="Table1.A1" office:value-type="string">
            <text:p text:style-name="Table_20_Contents">VC-1</text:p>
          </table:table-cell>
          <table:table-cell table:style-name="Table1.A1" office:value-type="string">
            <text:p text:style-name="Table_20_Contents"><text:span text:style-name="Source_20_Text">WVC1</text:span></text:p>
          </table:table-cell>
          <table:table-cell table:style-name="Table1.A1" office:value-type="string">
            <text:p text:style-name="Table_20_Contents">Rare now</text:p>
          </table:table-cell>
        </table:table-row>
        <table:table-row>
          <table:table-cell table:style-name="Table1.A1" office:value-type="string">
            <text:p text:style-name="Table_20_Contents">HuffYUV</text:p>
          </table:table-cell>
          <table:table-cell table:style-name="Table1.A1" office:value-type="string">
            <text:p text:style-name="Table_20_Contents"><text:span text:style-name="Source_20_Text">HFYU</text:span></text:p>
          </table:table-cell>
          <table:table-cell table:style-name="Table1.A1" office:value-type="string">
            <text:p text:style-name="Table_20_Contents">AVI mostly</text:p>
          </table:table-cell>
        </table:table-row>
      </table:table>
      <text:p text:style-name="P58"/>
      <text:h text:style-name="P59" text:outline-level="2">ProRes tags</text:h>
      <text:p text:style-name="P60">These <text:span text:style-name="T83">could </text:span>matter quite a bit in broadcast workflows:</text:p>
      <table:table table:name="Table2" table:style-name="Table2">
        <table:table-column table:style-name="Table2.A"/>
        <table:table-column table:style-name="Table2.B"/>
        <table:table-header-rows>
          <table:table-row>
            <table:table-cell table:style-name="Table2.A1" office:value-type="string">
              <text:p text:style-name="Table_20_Heading">Profile</text:p>
            </table:table-cell>
            <table:table-cell table:style-name="Table2.A1" office:value-type="string">
              <text:p text:style-name="Table_20_Heading">Tag</text:p>
            </table:table-cell>
          </table:table-row>
        </table:table-header-rows>
        <table:table-row>
          <table:table-cell table:style-name="Table2.A1" office:value-type="string">
            <text:p text:style-name="Table_20_Contents">ProRes Proxy</text:p>
          </table:table-cell>
          <table:table-cell table:style-name="Table2.A1" office:value-type="string">
            <text:p text:style-name="Table_20_Contents"><text:span text:style-name="Source_20_Text">apco</text:span></text:p>
          </table:table-cell>
        </table:table-row>
        <table:table-row>
          <table:table-cell table:style-name="Table2.A1" office:value-type="string">
            <text:p text:style-name="Table_20_Contents">ProRes LT</text:p>
          </table:table-cell>
          <table:table-cell table:style-name="Table2.A1" office:value-type="string">
            <text:p text:style-name="Table_20_Contents"><text:span text:style-name="Source_20_Text">apcs</text:span></text:p>
          </table:table-cell>
        </table:table-row>
        <table:table-row>
          <table:table-cell table:style-name="Table2.A1" office:value-type="string">
            <text:p text:style-name="Table_20_Contents">ProRes 422</text:p>
          </table:table-cell>
          <table:table-cell table:style-name="Table2.A1" office:value-type="string">
            <text:p text:style-name="Table_20_Contents"><text:span text:style-name="Source_20_Text">apcn</text:span></text:p>
          </table:table-cell>
        </table:table-row>
        <table:table-row>
          <table:table-cell table:style-name="Table2.A1" office:value-type="string">
            <text:p text:style-name="Table_20_Contents">ProRes HQ</text:p>
          </table:table-cell>
          <table:table-cell table:style-name="Table2.A1" office:value-type="string">
            <text:p text:style-name="Table_20_Contents"><text:span text:style-name="Source_20_Text">apch</text:span></text:p>
          </table:table-cell>
        </table:table-row>
        <table:table-row>
          <table:table-cell table:style-name="Table2.A1" office:value-type="string">
            <text:p text:style-name="Table_20_Contents">ProRes 4444</text:p>
          </table:table-cell>
          <table:table-cell table:style-name="Table2.A1" office:value-type="string">
            <text:p text:style-name="Table_20_Contents"><text:span text:style-name="Source_20_Text">ap4h</text:span></text:p>
          </table:table-cell>
        </table:table-row>
        <table:table-row>
          <table:table-cell table:style-name="Table2.A1" office:value-type="string">
            <text:p text:style-name="Table_20_Contents">ProRes XQ</text:p>
          </table:table-cell>
          <table:table-cell table:style-name="Table2.A1" office:value-type="string">
            <text:p text:style-name="Table_20_Contents"><text:span text:style-name="Source_20_Text">ap4x</text:span></text:p>
          </table:table-cell>
        </table:table-row>
      </table:table>
      <text:p text:style-name="P61"/>
      <text:p text:style-name="P61">Video Tags are rarely needed, but included for completeness.</text:p>
      <text:p text:style-name="P56"/>
      <text:p text:style-name="P62"><text:span text:style-name="T74">Video Stream ID: </text:span><text:span text:style-name="T75">Sets the stream id for the video stream. </text:span><text:span text:style-name="T77">(command line option is -</text:span><text:span text:style-name="T75">streamid:v</text:span><text:span text:style-name="T77">)</text:span></text:p>
      <text:p text:style-name="P62"><text:span text:style-name="T74"/></text:p>
      <text:p text:style-name="P63"><text:soft-page-break/><text:span text:style-name="T84">A</text:span><text:span text:style-name="T85">nalyze </text:span><text:span text:style-name="T86">Video</text:span><text:span text:style-name="T85">:</text:span><text:span text:style-name="T84"> </text:span><text:span text:style-name="T87"><text:s/></text:span><text:span text:style-name="T88">This option allows for analyzing the </text:span><text:span text:style-name="T89">video</text:span><text:span text:style-name="T88"> file first, then processing</text:span><text:span text:style-name="T90">. </text:span><text:span text:style-name="T91">Only Reports are supported currently. Rendering will be added later.</text:span></text:p>
      <text:p text:style-name="P64"/>
      <text:p text:style-name="P65"><text:span text:style-name="T92">Show Analysis Report </text:span><text:span text:style-name="T93">(Video)</text:span><text:span text:style-name="T92">:</text:span><text:span text:style-name="T94"> </text:span><text:span text:style-name="T77"><text:s/></text:span><text:span text:style-name="T95">This option will create a text file in the </text:span><text:span text:style-name="T96">Output Directory</text:span><text:span text:style-name="T95"> containing the results of </text:span><text:span text:style-name="T97">either</text:span><text:span text:style-name="T95"> loudnorm or volumedetect. When checked, this will ONLY create a report. It will NOT render anything. </text:span><text:span text:style-name="T98">NOTE: Cl</text:span><text:span text:style-name="T99">i</text:span><text:span text:style-name="T98">cking this box is a one shot deal. This does not get saved into the factory data. You must check it with each session when you need to use it.</text:span></text:p>
      <text:p text:style-name="P66"><text:span text:style-name="T77"/></text:p>
      <text:p text:style-name="P67"><text:span text:style-name="T74"/></text:p>
      <text:p text:style-name="P67"><text:span text:style-name="T77"/></text:p>
      <text:p text:style-name="P68"/>
      <text:p text:style-name="P49"/>
      <text:p text:style-name="P49"/>
      <text:p text:style-name="P49"/>
      <text:p text:style-name="P49"/>
      <text:p text:style-name="P49"/>
      <text:p text:style-name="P49">Audio Tab:</text:p>
      <text:p text:style-name="P69"><draw:frame draw:style-name="fr1" draw:name="Image10" text:anchor-type="char" svg:x="0.0236in" svg:y="0.0898in" svg:width="6.9252in" svg:height="1.7862in" draw:z-index="10"><draw:image xlink:href="Pictures/1000000000000333000000C785B34B8D.png" xlink:type="simple" xlink:show="embed" xlink:actuate="onLoad" draw:mime-type="image/png"/></draw:frame></text:p>
      <text:p text:style-name="P69"/>
      <text:p text:style-name="P69"><text:span text:style-name="T54">Audio Codec: </text:span><text:span text:style-name="T77">If the file you are converting is a</text:span><text:span text:style-name="T100">n</text:span><text:span text:style-name="T77"> </text:span><text:span text:style-name="T100">audio</text:span><text:span text:style-name="T77"> file, you must specify a </text:span><text:span text:style-name="T100">c</text:span><text:span text:style-name="T77">odec here. Select copy if you want to keep the original </text:span><text:span text:style-name="T101">codec</text:span><text:span text:style-name="T102">*</text:span><text:span text:style-name="T101">. </text:span><text:span text:style-name="T77">Any fields left empty will simply default to the input file’s settings </text:span><text:span text:style-name="T101">except for this one</text:span><text:span text:style-name="T77">. </text:span><text:span text:style-name="T103">If the codec you need is not in the predefined list, you may type it in manually here. </text:span><text:span text:style-name="T77">(command line option is -c:</text:span><text:span text:style-name="T100">a</text:span><text:span text:style-name="T77">)</text:span></text:p>
      <text:p text:style-name="P50"><text:span text:style-name="T104"/></text:p>
      <text:p text:style-name="P50"><text:span text:style-name="T104">*IMPORTANT: </text:span><text:span text:style-name="T102">When selecting “copy” in the </text:span><text:span text:style-name="T66">audio </text:span><text:span text:style-name="T102">codec widget, all options requir</text:span><text:span text:style-name="T105">ing</text:span><text:span text:style-name="T102"> rendering audio will be blanked and ghosted preventing one from entering invalid options. </text:span><text:span text:style-name="T66">This is because the codec “copy” is exclusive. If for example you would happen to have copy as the codec and a bitrate specified, copy is then ignored in favor of rendering because there is a bitrate specified. In this particular case, the original codec would be still maintained, but re-rendering would be forced with a new bitrate.</text:span></text:p>
      <text:p text:style-name="P50"><text:span text:style-name="T66"/></text:p>
      <text:p text:style-name="P70"><text:span text:style-name="T106">Audio </text:span><text:span text:style-name="T54">File Ext: </text:span><text:span text:style-name="T100">Only useful if you are converting audio </text:span><text:span text:style-name="T66">only </text:span><text:span text:style-name="T100">files. </text:span><text:span text:style-name="T107">Use ONLY with pure AUDIO Factories</text:span><text:span text:style-name="T108">.</text:span></text:p>
      <text:p text:style-name="P69"><text:span text:style-name="T54"/></text:p>
      <text:p text:style-name="P69"><text:span text:style-name="T54">Audio Bitrate: </text:span><text:span text:style-name="T100">Sets the bitrate of the audio stream or file. </text:span><text:span text:style-name="T77">(command line option is -</text:span><text:span text:style-name="T100">b</text:span><text:span text:style-name="T77">:</text:span><text:span text:style-name="T100">a</text:span><text:span text:style-name="T77">)</text:span></text:p>
      <text:p text:style-name="P69"><text:span text:style-name="T54"/></text:p>
      <text:p text:style-name="P69"><text:span text:style-name="T54">Audio Samplerate: </text:span><text:span text:style-name="T100">Sets the samplerate of the audio stream or file. </text:span><text:span text:style-name="T77">(command line option is -</text:span><text:span text:style-name="T100">ar</text:span><text:span text:style-name="T77">)</text:span></text:p>
      <text:p text:style-name="P69"><text:span text:style-name="T54"/></text:p>
      <text:p text:style-name="P69"><text:span text:style-name="T54">Audio Channels: </text:span><text:span text:style-name="T100">Sets the amount of audio channels of the audio stream or file. </text:span><text:span text:style-name="T77">(command line option is -</text:span><text:span text:style-name="T100">ac</text:span><text:span text:style-name="T77">)</text:span></text:p>
      <text:p text:style-name="P69"><text:span text:style-name="T54"/></text:p>
      <text:p text:style-name="P69"><text:span text:style-name="T54">Audio Stream ID: </text:span><text:span text:style-name="T100">Sets the stream ID of the audio stream when used with other audio or video streams. </text:span><text:span text:style-name="T77">(command line option is -</text:span><text:span text:style-name="T100">streamid:a</text:span><text:span text:style-name="T77">)</text:span></text:p>
      <text:p text:style-name="P71"/>
      <text:p text:style-name="P57"><text:span text:style-name="T80">Audio</text:span><text:span text:style-name="T79"> </text:span><text:span text:style-name="T80">Tags</text:span><text:span text:style-name="T79">:</text:span><text:span text:style-name="T81"> </text:span><text:span text:style-name="T109">C</text:span><text:span text:style-name="T57">ommand line option is -</text:span><text:span text:style-name="T83">tag</text:span><text:span text:style-name="T57">:</text:span><text:span text:style-name="T83">a</text:span></text:p>
      <text:h text:style-name="P72" text:outline-level="2"><text:span text:style-name="T20">Common </text:span><text:span text:style-name="Source_20_Text"><text:span text:style-name="T20">-atag</text:span></text:span><text:span text:style-name="T20"> values</text:spa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Codec</text:p>
            </table:table-cell>
            <table:table-cell table:style-name="Table3.A1" office:value-type="string">
              <text:p text:style-name="Table_20_Heading">atag</text:p>
            </table:table-cell>
            <table:table-cell table:style-name="Table3.A1" office:value-type="string">
              <text:p text:style-name="Table_20_Heading">Notes</text:p>
            </table:table-cell>
          </table:table-row>
        </table:table-header-rows>
        <table:table-row>
          <table:table-cell table:style-name="Table3.A1" office:value-type="string">
            <text:p text:style-name="Table_20_Contents">AAC</text:p>
          </table:table-cell>
          <table:table-cell table:style-name="Table3.A1" office:value-type="string">
            <text:p text:style-name="Table_20_Contents"><text:span text:style-name="Source_20_Text">mp4a</text:span></text:p>
          </table:table-cell>
          <table:table-cell table:style-name="Table3.A1" office:value-type="string">
            <text:p text:style-name="Table_20_Contents">Standard MP4 AAC</text:p>
          </table:table-cell>
        </table:table-row>
        <text:soft-page-break/>
        <table:table-row>
          <table:table-cell table:style-name="Table3.A1" office:value-type="string">
            <text:p text:style-name="Table_20_Contents">MP3</text:p>
          </table:table-cell>
          <table:table-cell table:style-name="Table3.A1" office:value-type="string">
            <text:p text:style-name="Table_20_Contents"><text:span text:style-name="Source_20_Text">.mp3</text:span> / <text:span text:style-name="Source_20_Text">mp3 </text:span></text:p>
          </table:table-cell>
          <table:table-cell table:style-name="Table3.A1" office:value-type="string">
            <text:p text:style-name="Table_20_Contents">Depends on container</text:p>
          </table:table-cell>
        </table:table-row>
        <table:table-row>
          <table:table-cell table:style-name="Table3.A1" office:value-type="string">
            <text:p text:style-name="Table_20_Contents">PCM S16LE</text:p>
          </table:table-cell>
          <table:table-cell table:style-name="Table3.A1" office:value-type="string">
            <text:p text:style-name="Table_20_Contents"><text:span text:style-name="Source_20_Text">sowt</text:span></text:p>
          </table:table-cell>
          <table:table-cell table:style-name="Table3.A1" office:value-type="string">
            <text:p text:style-name="Table_20_Contents">QuickTime PCM</text:p>
          </table:table-cell>
        </table:table-row>
        <table:table-row>
          <table:table-cell table:style-name="Table3.A1" office:value-type="string">
            <text:p text:style-name="Table_20_Contents">PCM BE</text:p>
          </table:table-cell>
          <table:table-cell table:style-name="Table3.A1" office:value-type="string">
            <text:p text:style-name="Table_20_Contents"><text:span text:style-name="Source_20_Text">twos</text:span></text:p>
          </table:table-cell>
          <table:table-cell table:style-name="Table3.A1" office:value-type="string">
            <text:p text:style-name="Table_20_Contents">Old Mac PCM</text:p>
          </table:table-cell>
        </table:table-row>
        <table:table-row>
          <table:table-cell table:style-name="Table3.A1" office:value-type="string">
            <text:p text:style-name="Table_20_Contents">ALAC</text:p>
          </table:table-cell>
          <table:table-cell table:style-name="Table3.A1" office:value-type="string">
            <text:p text:style-name="Table_20_Contents"><text:span text:style-name="Source_20_Text">alac</text:span></text:p>
          </table:table-cell>
          <table:table-cell table:style-name="Table3.A1" office:value-type="string">
            <text:p text:style-name="Table_20_Contents">Apple Lossless</text:p>
          </table:table-cell>
        </table:table-row>
        <table:table-row>
          <table:table-cell table:style-name="Table3.A1" office:value-type="string">
            <text:p text:style-name="Table_20_Contents">AC3</text:p>
          </table:table-cell>
          <table:table-cell table:style-name="Table3.A1" office:value-type="string">
            <text:p text:style-name="Table_20_Contents"><text:span text:style-name="Source_20_Text">ac-3</text:span></text:p>
          </table:table-cell>
          <table:table-cell table:style-name="Table3.A1" office:value-type="string">
            <text:p text:style-name="Table_20_Contents">Dolby Digital</text:p>
          </table:table-cell>
        </table:table-row>
        <table:table-row>
          <table:table-cell table:style-name="Table3.A1" office:value-type="string">
            <text:p text:style-name="Table_20_Contents">E-AC3</text:p>
          </table:table-cell>
          <table:table-cell table:style-name="Table3.A1" office:value-type="string">
            <text:p text:style-name="Table_20_Contents"><text:span text:style-name="Source_20_Text">ec-3</text:span></text:p>
          </table:table-cell>
          <table:table-cell table:style-name="Table3.A1" office:value-type="string">
            <text:p text:style-name="Table_20_Contents">Dolby Digital Plus</text:p>
          </table:table-cell>
        </table:table-row>
        <table:table-row>
          <table:table-cell table:style-name="Table3.A1" office:value-type="string">
            <text:p text:style-name="Table_20_Contents">Opus</text:p>
          </table:table-cell>
          <table:table-cell table:style-name="Table3.A1" office:value-type="string">
            <text:p text:style-name="Table_20_Contents"><text:span text:style-name="Source_20_Text">Opus</text:span></text:p>
          </table:table-cell>
          <table:table-cell table:style-name="Table3.A1" office:value-type="string">
            <text:p text:style-name="Table_20_Contents">Mostly Matroska/WebM</text:p>
          </table:table-cell>
        </table:table-row>
        <table:table-row>
          <table:table-cell table:style-name="Table3.A1" office:value-type="string">
            <text:p text:style-name="Table_20_Contents">FLAC</text:p>
          </table:table-cell>
          <table:table-cell table:style-name="Table3.A1" office:value-type="string">
            <text:p text:style-name="Table_20_Contents"><text:span text:style-name="Source_20_Text">fLaC</text:span></text:p>
          </table:table-cell>
          <table:table-cell table:style-name="Table3.A1" office:value-type="string">
            <text:p text:style-name="Table_20_Contents">FLAC-in-MOV/MP4 sometimes</text:p>
          </table:table-cell>
        </table:table-row>
        <table:table-row>
          <table:table-cell table:style-name="Table3.A1" office:value-type="string">
            <text:p text:style-name="Table_20_Contents">DTS</text:p>
          </table:table-cell>
          <table:table-cell table:style-name="Table3.A1" office:value-type="string">
            <text:p text:style-name="Table_20_Contents"><text:span text:style-name="Source_20_Text">dtsc</text:span></text:p>
          </table:table-cell>
          <table:table-cell table:style-name="Table3.A1" office:value-type="string">
            <text:p text:style-name="Table_20_Contents">DTS core</text:p>
          </table:table-cell>
        </table:table-row>
      </table:table>
      <text:p text:style-name="P57"/>
      <text:p text:style-name="P61">Audio Tags are rarely needed, but included for completeness.</text:p>
      <text:p text:style-name="P57"/>
      <text:p text:style-name="P73"><text:span text:style-name="T84">A</text:span><text:span text:style-name="T85">nalyze Audio:</text:span><text:span text:style-name="T84"> </text:span><text:span text:style-name="T87"><text:s/></text:span><text:span text:style-name="T88">This option allows for analyzing the audio file first, then processing in an attempt to reach the numbers provided in the Audio Filters box. Once analyzed the Audio Filters line gets processed in the background to be more like this: <text:s/></text:span><text:span text:style-name="T110">loudnorm=I=-16:TP=-1.5:LRA=11:measured_I=...:measured_TP=...:measured_LRA=...:measured_thresh=...:offset=...:linear=true</text:span></text:p>
      <text:p text:style-name="P74"/>
      <text:p text:style-name="P75"><text:span text:style-name="T111">P</text:span><text:span text:style-name="T88">r</text:span><text:span text:style-name="T111">esently there are only two available options for Audio Analysis. Loudnorm and Volumedetect. Loudnorm is a able to render audio, volumedetect is a report ONLY filter and does nothing other than that. When volumedetect is selected, Show Analysis Report is also selected for this reason. See below.</text:span></text:p>
      <text:p text:style-name="P76"/>
      <text:p text:style-name="P77"><text:span text:style-name="T92">Show Analysis Report:</text:span><text:span text:style-name="T94"> </text:span><text:span text:style-name="T77"><text:s/></text:span><text:span text:style-name="T95">This option will create a text file in the </text:span><text:span text:style-name="T96">Output Directory</text:span><text:span text:style-name="T95"> containing the results of </text:span><text:span text:style-name="T97">either</text:span><text:span text:style-name="T95"> loudnorm or volumedetect. When checked, this will ONLY create a report. It will NOT render anything. </text:span><text:span text:style-name="T98">NOTE: Cl</text:span><text:span text:style-name="T99">i</text:span><text:span text:style-name="T98">cking this box is a one shot deal. This does not get saved into the factory data. You must check it with each session when you need to use it.</text:span></text:p>
      <text:p text:style-name="P78"/>
      <text:p text:style-name="P78"/>
      <text:p text:style-name="P78"/>
      <text:p text:style-name="P78"/>
      <text:p text:style-name="P79"><text:span text:style-name="T112">Subtitles/Captions</text:span><text:span text:style-name="T113"> Tab:</text:span></text:p>
      <text:p text:style-name="P80"><draw:frame draw:style-name="fr4" draw:name="Image11" text:anchor-type="char" svg:width="6.9252in" svg:height="1.898in" draw:z-index="11"><draw:image xlink:href="Pictures/1000000100000347000000E61F7AA932.png" xlink:type="simple" xlink:show="embed" xlink:actuate="onLoad" draw:mime-type="image/png"/></draw:frame></text:p>
      <text:p text:style-name="P80"/>
      <text:p text:style-name="P81"><text:span text:style-name="T70">Subtitle Codec:</text:span><text:span text:style-name="T69"> Selects the subtitle codec type. </text:span><text:span text:style-name="T57">(command line option is -</text:span><text:span text:style-name="T114">c</text:span><text:span text:style-name="T69">:</text:span><text:span text:style-name="T114">s</text:span><text:span text:style-name="T57">). </text:span><text:span text:style-name="T115">These can be copy, ass, mov_text, srt, ssa, Sidecar TTML and Sidecar SCC. The Sidecar selections are special use cases for playback devices which support Sidecar subtitles, usually only used in professional environments. Also supported by VLC in many cases.</text:span></text:p>
      <text:p text:style-name="P82"><text:span text:style-name="T116"/></text:p>
      <text:p text:style-name="P82"><text:span text:style-name="T116">RemoveA53cc:</text:span> <text:span text:style-name="T117">If checked, will remove DTVCC from the video stream (-a53cc 0). The default behavior of </text:span><text:span text:style-name="T118">FFMpeg</text:span><text:span text:style-name="T117"> is to always pass these types of subtitles even when re-rendering video.</text:span></text:p>
      <text:p text:style-name="P82"><text:span text:style-name="T117"/></text:p>
      <text:p text:style-name="P83"><text:span text:style-name="T116">Sidecar Frame Rate:</text:span><text:span text:style-name="T117"> Sets the framerate of SCC subtitles.</text:span></text:p>
      <text:p text:style-name="P83"><text:span text:style-name="T117"/></text:p>
      <text:p text:style-name="P83"><text:soft-page-break/><text:span text:style-name="T116">Roll-Up Lines:</text:span><text:span text:style-name="T117"> Sets how lines lines will roll up during captioning of SCC subtitles.</text:span></text:p>
      <text:p text:style-name="P80"/>
      <text:p text:style-name="P83"><text:span text:style-name="T116">Embed 608 as ST436:</text:span> <text:span text:style-name="T117">(Introduced in </text:span><text:span text:style-name="T118">FFMpeg</text:span><text:span text:style-name="T117"> v8.x). This adds the bitstream filter eia_to_smpte436m to the encode and will add eia608 subtitles as ST436 data.</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pan text:style-name="T115">Video Advanced Tab / GOP and Frame Control</text:span>:</text:p>
      <text:p text:style-name="P80"><draw:frame draw:style-name="fr4" draw:name="Image12" text:anchor-type="char" svg:width="6.9252in" svg:height="1.8945in" draw:z-index="12"><draw:image xlink:href="Pictures/1000000100000345000000E5CC6B3CD7.png" xlink:type="simple" xlink:show="embed" xlink:actuate="onLoad" draw:mime-type="image/png"/></draw:frame></text:p>
      <text:p text:style-name="P80"/>
      <text:p text:style-name="P84"><text:span text:style-name="T119">Video Format:</text:span><text:span text:style-name="T77"> Forces the video format for component, pal, ntsc, secam and mac. Generally for professional use and not normally need</text:span><text:span text:style-name="T120">ed</text:span><text:span text:style-name="T77"> for casual users.</text:span></text:p>
      <text:p text:style-name="P69"><text:span text:style-name="T77"/></text:p>
      <text:p text:style-name="P85"><text:span text:style-name="T74">Video B-Frames: </text:span><text:span text:style-name="T75">Sets the bi-directional frames. </text:span><text:span text:style-name="T77">(command line option is -</text:span><text:span text:style-name="T75">bf</text:span><text:span text:style-name="T77">)</text:span></text:p>
      <text:p text:style-name="P85"><text:span text:style-name="T74"/></text:p>
      <text:p text:style-name="P85"><text:span text:style-name="T74">GOP Size: </text:span><text:span text:style-name="T75">Sets the Group of Pictures size.</text:span><text:span text:style-name="T74"> </text:span><text:span text:style-name="T77">(command line option is -</text:span><text:span text:style-name="T75">g</text:span><text:span text:style-name="T77">)</text:span></text:p>
      <text:p text:style-name="P69"><text:span text:style-name="T77"/></text:p>
      <text:p text:style-name="P86">Frame Strategy: </text:p>
      <text:p text:style-name="P69"><text:span text:style-name="T77"/></text:p>
      <text:p text:style-name="P80"/>
      <text:p text:style-name="P80"><text:span text:style-name="T115">Video Advanced Tab / Color and HDR</text:span><text:span text:style-name="T57">:</text:span></text:p>
      <text:p text:style-name="P87">These advanced color settings are only useful for some codecs. Mpeg2video and h26x are good examples.</text:p>
      <text:p text:style-name="P69"><text:span text:style-name="T77"/></text:p>
      <text:p text:style-name="P69"><draw:frame draw:style-name="fr4" draw:name="Image13" text:anchor-type="char" svg:width="6.9252in" svg:height="1.9134in" draw:z-index="13"><draw:image xlink:href="Pictures/1000000100000344000000E719DA6462.png" xlink:type="simple" xlink:show="embed" xlink:actuate="onLoad" draw:mime-type="image/png"/></draw:frame></text:p>
      <text:p text:style-name="P88"><text:soft-page-break/><text:span text:style-name="T57">C</text:span>olorspace: <text:span text:style-name="T117">Sets the color space.</text:span></text:p>
      <text:p text:style-name="P69"><text:span text:style-name="T77"/></text:p>
      <text:p text:style-name="P88"><text:span text:style-name="T57">Color</text:span>range<text:span text:style-name="T57">:</text:span><text:span text:style-name="T77"> </text:span><text:span text:style-name="T117">Sets the color range.</text:span></text:p>
      <text:p text:style-name="P88"><text:span text:style-name="T77"/></text:p>
      <text:p text:style-name="P88"><text:span text:style-name="T57">C</text:span>olorTRC:<text:span text:style-name="T117"> Selects color transfer.</text:span></text:p>
      <text:p text:style-name="P88"><text:span text:style-name="T117"/></text:p>
      <text:p text:style-name="P88">Chroma Sample Location:<text:span text:style-name="T117"> Choose the chroma sample location.</text:span></text:p>
      <text:p text:style-name="P88"><text:span text:style-name="T117"/></text:p>
      <text:p text:style-name="P88">Color Primaries:<text:span text:style-name="T117"> Sets color primaries.</text:span></text:p>
      <text:p text:style-name="P88"><text:span text:style-name="T77"/></text:p>
      <text:p text:style-name="P88"><text:span text:style-name="T77"/></text:p>
      <text:p text:style-name="P89"/>
      <text:p text:style-name="P89"/>
      <text:p text:style-name="P89"/>
      <text:p text:style-name="P89"/>
      <text:p text:style-name="P89"/>
      <text:p text:style-name="P89"/>
      <text:p text:style-name="P89"/>
      <text:p text:style-name="P89"><text:span text:style-name="T115">Video Advanced Tab / </text:span><text:span text:style-name="T121">Standards and Field Order:</text:span></text:p>
      <text:p text:style-name="P69"><draw:frame draw:style-name="fr1" draw:name="Image14" text:anchor-type="char" svg:x="0.0382in" svg:y="0in" svg:width="6.9252in" svg:height="1.922in" draw:z-index="14"><draw:image xlink:href="Pictures/1000000100000340000000E7518CB938.png" xlink:type="simple" xlink:show="embed" xlink:actuate="onLoad" draw:mime-type="image/png"/></draw:frame><text:span text:style-name="T77"/></text:p>
      <text:p text:style-name="P88">Alternate Scan: <text:span text:style-name="T117">Enables the alternate scantable.</text:span></text:p>
      <text:p text:style-name="P88"/>
      <text:p text:style-name="P88">Non L<text:span text:style-name="T71">inear</text:span> Quantize: <text:span text:style-name="T117">Uses nonlinear quantizer.</text:span></text:p>
      <text:p text:style-name="P88"/>
      <text:p text:style-name="P88">Signal Standard: <text:span text:style-name="T117">Force/set Signal Standard (mxf files).</text:span></text:p>
      <text:p text:style-name="P88"/>
      <text:p text:style-name="P88">Seq Disp Ext: <text:span text:style-name="T117">Writes sequence display extension blocks.</text:span></text:p>
      <text:p text:style-name="P88"/>
      <text:p text:style-name="P88">Field Order: <text:span text:style-name="T117">Change field order on interlaced files.</text:span></text:p>
      <text:p text:style-name="P88"/>
      <text:p text:style-name="P88">Intra VLC: <text:span text:style-name="T117">Use MPEG-2 intra VLC table.</text:span></text:p>
      <text:p text:style-name="P88"/>
      <text:p text:style-name="P88">DC: <text:s/><text:span text:style-name="T117">Intra_dc_precision from -8 to 16.</text:span></text:p>
      <text:p text:style-name="P89"/>
      <text:p text:style-name="P89"/>
      <text:p text:style-name="P89"><text:span text:style-name="T115">Video Advanced Tab / </text:span><text:span text:style-name="T121">Flags Builders:</text:span></text:p>
      <text:p text:style-name="P69"><text:span text:style-name="T77"/></text:p>
      <text:p text:style-name="P69"><draw:frame draw:style-name="fr1" draw:name="Image15" text:anchor-type="char" svg:x="0.0382in" svg:y="0in" svg:width="6.9252in" svg:height="1.8929in" draw:z-index="15"><draw:image xlink:href="Pictures/1000000000000346000000E7CB7F1C53.png" xlink:type="simple" xlink:show="embed" xlink:actuate="onLoad" draw:mime-type="image/png"/></draw:frame><text:soft-page-break/></text:p>
      <text:p text:style-name="P90"><text:span text:style-name="T122">Flags </text:span><text:span text:style-name="T123">and Flags2 Builder</text:span><text:span text:style-name="T122">:</text:span><text:span text:style-name="T124"> </text:span><text:span text:style-name="T125">Advanced encoder bitstream flags (-flags). </text:span>Optional; most encodes don’t need these. Checked items are collected into FLAGS as +tokens. Disabled when Video Codec=copy.</text:p>
      <text:p text:style-name="P91">Additional/legacy flags (-flags2). Mostly for analysis or bitstream quirks. Checked items are collected into FLAGS2 as +tokens. Often ignored by some encoders.</text:p>
      <text:p text:style-name="P92"><text:span text:style-name="T126">Mov</text:span><text:span text:style-name="T116">Flags Builder: </text:span><text:span text:style-name="T127">Same as above (-movflags)</text:span></text:p>
      <text:p text:style-name="P93"><text:span text:style-name="T116">FFlags Builder:</text:span> Operation is same as above <text:span text:style-name="T128">(-fflags)</text:span>.</text:p>
      <text:p text:style-name="P94"/>
      <text:p text:style-name="P95"/>
      <text:p text:style-name="P95"/>
      <text:p text:style-name="P95">Bottom of Factory Builder Tab:</text:p>
      <text:p text:style-name="P96"><draw:frame draw:style-name="fr5" draw:name="Image17" text:anchor-type="char" svg:width="6.9252in" svg:height="2.161in" draw:z-index="17"><draw:image xlink:href="Pictures/1000000100000351000001092D976F44.png" xlink:type="simple" xlink:show="embed" xlink:actuate="onLoad" draw:mime-type="image/png"/></draw:frame><text:span text:style-name="T129">Timing Controls:<text:line-break/></text:span><text:span text:style-name="T130">Start Offset: </text:span><text:span text:style-name="T131">This tells </text:span><text:span text:style-name="T132">FFMpeg</text:span><text:span text:style-name="T131"> where to start encoding within the file, in </text:span><text:span text:style-name="T133">seconds or hh:mm:ss.mmm</text:span><text:span text:style-name="T131">. </text:span><text:span text:style-name="T134">(command line option is -</text:span><text:span text:style-name="T131">ss</text:span><text:span text:style-name="T134">)</text:span></text:p>
      <text:p text:style-name="P97"><text:span text:style-name="T74">Encode Length: </text:span><text:span text:style-name="T75">This is the length to encode. This is very useful for testing factories for long form programming. </text:span><text:span text:style-name="T77">(command line option is -t)</text:span></text:p>
      <text:p text:style-name="P70"><text:span text:style-name="T54"/></text:p>
      <text:p text:style-name="P98">FreeFactory Service Options:</text:p>
      <text:p text:style-name="P70"><text:span text:style-name="T54">Enable Factory: </text:span><text:span text:style-name="T135">(Default Enabled)</text:span><text:span text:style-name="T136"> </text:span><text:span text:style-name="T100">Only used with the FreeFactory service. </text:span><text:span text:style-name="T78">Disabled Factories are ignored by the service.</text:span></text:p>
      <text:p text:style-name="P69"><text:span text:style-name="T54"/></text:p>
      <text:p text:style-name="P69"><text:span text:style-name="T54">Remove Logs: </text:span><text:span text:style-name="T135">(Default Enabled)</text:span><text:span text:style-name="T136"> </text:span><text:span text:style-name="T100">Only used with the FreeFactory service. </text:span><text:span text:style-name="T135">This forces FreeFactory service to remove logs after completely a job. If you are experiencing encoding issues, turn this off so you may view the log which is saved in /var/log/FreeFactory. </text:span></text:p>
      <text:p text:style-name="P69"><text:span text:style-name="T54"/></text:p>
      <text:p text:style-name="P99"><text:soft-page-break/><text:span text:style-name="T137">Delete</text:span><text:span text:style-name="T54"> Source: </text:span><text:span text:style-name="T135">(Default Enabled)</text:span><text:span text:style-name="T136"> </text:span><text:span text:style-name="T100">Only used with the FreeFactory service. </text:span><text:span text:style-name="T135">Deletes the original file from the drop folder once processing has completed successfully.</text:span></text:p>
      <text:p text:style-name="P69"><text:span text:style-name="T100"/></text:p>
      <text:p text:style-name="P98"><text:span text:style-name="T138">F</text:span>inal Output:</text:p>
      <text:p text:style-name="P97"><text:span text:style-name="T74">Force Format: </text:span><text:span text:style-name="T139">Forces the format of the output file. ie. can be used to force a mp4 file to flv for streaming. </text:span><text:span text:style-name="T77">(command line option is -</text:span><text:span text:style-name="T139">f</text:span><text:span text:style-name="T77">)</text:span></text:p>
      <text:p text:style-name="P97"><text:span text:style-name="T77"/></text:p>
      <text:p text:style-name="P100"><text:span text:style-name="T57">E</text:span>nable Multi-Output: <text:span text:style-name="T117">When enabled, this will take FreeFactory out of single file generation mode and allow multiple output files to be created. This is useful for splitting up a 5.1 channel audio stream into six individual audio files. This can also be used to split a media file into separate streams such as .m4v, .ac3, .srt, etc. When selected, options that pertain to single file output are ghosted and unusable by default such as Muxer, Notify Directory, Force Output Format, Audio File Ext and Subtitle codec. </text:span></text:p>
      <text:p text:style-name="P100"><text:span text:style-name="T117"/></text:p>
      <text:p text:style-name="P100"><text:span text:style-name="T117">Each output must be specified for OUTDIR and STEM({outdir}{stem}). OUTDIR is pulled from the Output Directory field and STEM is pulled from the dropped filename. <text:s/></text:span><text:span text:style-name="T140">This advanced feature only works with local drag and drop encoding and does not work with the FreeFactory Service.</text:span></text:p>
      <text:p text:style-name="P69"><text:span text:style-name="T100"/></text:p>
      <text:p text:style-name="P101"><text:span text:style-name="T141">S</text:span><text:span text:style-name="T116">treams Disable:</text:span><text:span text:style-name="T117"> There are four options here. Disable Video, Audio, Subs and Data. This attempts on a per stream basis to ignore and not pass these types of streams. Disable Video is very useful when converting audio files that may have embedded covers, video clips or photos. Disable Subs and/or Data to remove lyrics and other (useless) data.</text:span></text:p>
      <text:p text:style-name="P102"><text:span text:style-name="T54"/></text:p>
      <text:p text:style-name="P102"><text:span text:style-name="T54">Manual </text:span><text:span text:style-name="T58">Input Opt</text:span><text:span text:style-name="T67">ion</text:span><text:span text:style-name="T58">s</text:span><text:span text:style-name="T54">: </text:span><text:span text:style-name="T142">These are </text:span><text:span text:style-name="T143">input options</text:span><text:span text:style-name="T142"> only.</text:span><text:span text:style-name="T144"> </text:span><text:span text:style-name="T100">This field <text:s/></text:span><text:span text:style-name="T143">(and Manual Output Opts) </text:span><text:span text:style-name="T100">is the REAL power of FreeFactory. </text:span><text:span text:style-name="T143">Options in this field always end up BEFORE the -i [filename].</text:span><text:span text:style-name="T100"> <text:s/></text:span><text:span text:style-name="T143">Input options can include -f, -i or even hardware options for Intel CPUs (-hwaccel vaapi -hwaccel_device intel). </text:span></text:p>
      <text:p text:style-name="P70"><text:span text:style-name="T54"/></text:p>
      <text:p text:style-name="P70"><text:span text:style-name="T54">Manual </text:span><text:span text:style-name="T58">Output Opt</text:span><text:span text:style-name="T67">ion</text:span><text:span text:style-name="T58">s</text:span><text:span text:style-name="T54">: </text:span><text:span text:style-name="T142">These are output only.</text:span><text:span text:style-name="T144"> </text:span><text:span text:style-name="T100">This field is the REAL power of FreeFactory. While FreeFactory attempts to provide the most used options in the GUI, there is simply no way it can because there are so many. Advanced users can use this field to build complete </text:span><text:span text:style-name="T118">FFMpeg</text:span><text:span text:style-name="T100"> command line structures, or just add options to your GUI options </text:span><text:span text:style-name="T78">that are unavailable otherwise </text:span><text:span text:style-name="T100">as well.</text:span></text:p>
      <text:p text:style-name="P70"><text:span text:style-name="T54"/></text:p>
      <text:p text:style-name="P70"><text:span text:style-name="T54">Command Line Preview: </text:span><text:span text:style-name="T100">This allows you to see the complete </text:span><text:span text:style-name="T118">FFMpeg</text:span><text:span text:style-name="T100"> command that FreeFactory generates. It combines all the UI selections as well as the Manual Options </text:span><text:span text:style-name="T78">and Streaming Options</text:span><text:span text:style-name="T100">. You can also copy this line and try it from your shell to test for issues.</text:span></text:p>
      <text:p text:style-name="P70"><text:span text:style-name="T54"/></text:p>
      <text:p text:style-name="P70"><text:span text:style-name="T54">Drop Zone: </text:span><text:span text:style-name="T100">This allows dropping a file to be converted using the currently selected Factory. </text:span><text:span text:style-name="T143">Combined with Encode Length, this is a great way to test factories, especially when creating factories for the background service.</text:span></text:p>
      <text:p text:style-name="P103"/>
      <text:p text:style-name="P104"/>
      <text:p text:style-name="P104">Local Batch File Processing Tab</text:p>
      <text:p text:style-name="P105"><draw:frame draw:style-name="fr1" draw:name="Image5" text:anchor-type="char" svg:x="0.0035in" svg:y="0in" svg:width="4.5402in" svg:height="3.0008in" draw:z-index="5"><draw:image xlink:href="Pictures/1000000100000455000003084930BCA2.png" xlink:type="simple" xlink:show="embed" xlink:actuate="onLoad" draw:mime-type="image/png"/></draw:frame></text:p>
      <text:p text:style-name="P106"><text:soft-page-break/>This tab is used for processing multiple files. Drop your files into the Drop Zone <text:span text:style-name="T145">(bottom left)</text:span>. The files are encoded using the currently selected factory in the Factory Builder tab. Do NOT change Factories on the Builder Tab while batch processing files or the newly selected Factory will be applied to the next item in the Queue table. The files will be output to the Output Directory specified in your Factory.</text:p>
      <text:p text:style-name="P106"/>
      <text:p text:style-name="P107"><text:span text:style-name="T146">Start Queue:</text:span> <text:span text:style-name="T147">Starts encoding the file list.</text:span></text:p>
      <text:p text:style-name="P107"><text:span text:style-name="T146"/></text:p>
      <text:p text:style-name="P107"><text:span text:style-name="T146">Pause/Resume Queue:</text:span> <text:span text:style-name="T147">Does just what it says. Pauses and resumes encoding. </text:span><text:span text:style-name="T148">If a file is encoding when you click Pause, it will continue to render until finishing or fail and then Pause the queue.</text:span></text:p>
      <text:p text:style-name="P106"><text:span text:style-name="T54"/></text:p>
      <text:p text:style-name="P106"><text:span text:style-name="T54">Remove Selected:</text:span> Removes selected items from the Queue table.</text:p>
      <text:p text:style-name="P106"><text:span text:style-name="T54"/></text:p>
      <text:p text:style-name="P106"><text:span text:style-name="T54">Clear Queue:</text:span> Clears <text:span text:style-name="T149">t</text:span>he Queue table.</text:p>
      <text:p text:style-name="P106"><text:span text:style-name="T54"/></text:p>
      <text:p text:style-name="P106"><text:span text:style-name="T54">Queue Table: </text:span><text:span text:style-name="T150">The list of files to be encoded.</text:span><text:span text:style-name="T151"> </text:span></text:p>
      <text:p text:style-name="P106"><text:span text:style-name="T54"/></text:p>
      <text:p text:style-name="P106"><text:span text:style-name="T54">File Drop Zone:</text:span> <text:span text:style-name="T152">Drop your files here.</text:span></text:p>
      <text:p text:style-name="P108"/>
      <text:p text:style-name="P109"/>
      <text:p text:style-name="P109"/>
      <text:p text:style-name="P109"/>
      <text:p text:style-name="P109"/>
      <text:p text:style-name="P109"/>
      <text:p text:style-name="P109"/>
      <text:p text:style-name="P109"/>
      <text:p text:style-name="P109"/>
      <text:p text:style-name="P109">Live Stream <text:span text:style-name="T153">and Record </text:span>Manager tab</text:p>
      <text:p text:style-name="P110"><draw:frame draw:style-name="fr1" draw:name="Image6" text:anchor-type="char" svg:x="0.0209in" svg:y="0in" svg:width="4.589in" svg:height="3.0425in" draw:z-index="6"><draw:image xlink:href="Pictures/100000010000045800000308D64C3000.png" xlink:type="simple" xlink:show="embed" xlink:actuate="onLoad" draw:mime-type="image/png"/></draw:frame></text:p>
      <text:p text:style-name="P111"><text:span text:style-name="T151">M</text:span><text:span text:style-name="T54">ode: </text:span><text:span text:style-name="T117">This button selects the tab mode which can be one of Off, Stream, Record or Record+Stream. Selecting Stream mode will unlock all the Streaming Controls. Selecting Record mode will unlock the recording widgets. Selecting Record+Stream will unlock the entire tab. This selection gets saved as a Factory Key (STREAMMGRMODE) and is used to identify the factory type. <text:s/></text:span></text:p>
      <text:p text:style-name="P112"><text:span text:style-name="T151"/></text:p>
      <text:p text:style-name="P112"><text:span text:style-name="T151">Select Streaming Factory</text:span><text:span text:style-name="T146">:</text:span><text:span text:style-name="T54"> </text:span><text:span text:style-name="T66">This now follows the factory selection from the Builder tab if the factory selected has mode set to anything but “Off”.</text:span><text:span text:style-name="T154"> </text:span><text:span text:style-name="T66">You should never need to click on this as it does nothing except show you the selected stream or record</text:span><text:span text:style-name="T155">ing</text:span><text:span text:style-name="T66"> factory.</text:span><text:span text:style-name="T150"> </text:span><text:span text:style-name="T143">It is now filtered to only contain Stream and Record factories. </text:span><text:span text:style-name="T150">You must first select your Stream Factory from the Factory Builder tab, </text:span><text:span text:style-name="T66">switch back to this tab </text:span><text:span text:style-name="T150">then click </text:span><text:span text:style-name="T156">Add Stream</text:span><text:span text:style-name="T150"> to add it to </text:span><text:span text:style-name="T155">the Stream Table</text:span><text:span text:style-name="T150">. You must repeat </text:span><text:soft-page-break/><text:span text:style-name="T150">this process for each Streaming Factory added. </text:span><text:span text:style-name="T66">If you make any </text:span><text:span text:style-name="T155">edits</text:span><text:span text:style-name="T66">, </text:span><text:span text:style-name="T155">you can </text:span><text:span text:style-name="T66">use the hotkey combination CTRL+S to save the factory. This prevents you from having to go back and forth between the </text:span><text:span text:style-name="T157">Builder and Streaming tabs</text:span><text:span text:style-name="T66"> </text:span><text:span text:style-name="T157">just </text:span><text:span text:style-name="T66">to save changes.</text:span></text:p>
      <text:p text:style-name="P111"><text:span text:style-name="T158"/></text:p>
      <text:p text:style-name="P111"><text:span text:style-name="T158">I</text:span><text:span text:style-name="T116">nput Preset:</text:span><text:span text:style-name="T117"> (not yet active) This will eventually be used to create basic beginner point presets.</text:span></text:p>
      <text:p text:style-name="P113"><text:span text:style-name="T54"/></text:p>
      <text:p text:style-name="P113"><text:span text:style-name="T54">Force Format </text:span><text:span text:style-name="T159">Input </text:span><text:span text:style-name="T54">Video: </text:span><text:span text:style-name="T160">This can be any of file, x11grab, </text:span><text:span text:style-name="T155">x</text:span><text:span text:style-name="T160">cbgrab, v4l2, </text:span><text:span text:style-name="T155">lavfi or concat.</text:span></text:p>
      <text:p text:style-name="P113"><text:span text:style-name="T54"/></text:p>
      <text:p text:style-name="P113"><text:span text:style-name="T54">Force Format </text:span><text:span text:style-name="T159">Input </text:span><text:span text:style-name="T54">Audio: </text:span><text:span text:style-name="T160">This can be any of </text:span><text:span text:style-name="T155">file,</text:span><text:span text:style-name="T160"> pulse, alsa, dshow </text:span><text:span text:style-name="T155">or concat.</text:span></text:p>
      <text:p text:style-name="P113"><text:span text:style-name="T161"/></text:p>
      <text:p text:style-name="P113"><text:span text:style-name="T161">Input Source Video: </text:span><text:span text:style-name="T160">This is a screen (:0.0), a video device or a file. </text:span></text:p>
      <text:p text:style-name="P113"><text:span text:style-name="T161"/></text:p>
      <text:p text:style-name="P113"><text:span text:style-name="T161">Input Source Audio: </text:span><text:span text:style-name="T160">This can be default, hw:n,n, pulse, alsa, etc.</text:span><text:span text:style-name="T161"> </text:span></text:p>
      <text:p text:style-name="P113"><text:span text:style-name="T161"/></text:p>
      <text:p text:style-name="P113"><text:span text:style-name="T161">Stream Key: </text:span><text:span text:style-name="T160">Unique stream key for your account </text:span><text:span text:style-name="T162">or a unique string if you have your own server.</text:span></text:p>
      <text:p text:style-name="P113"><text:span text:style-name="T161"/></text:p>
      <text:p text:style-name="P113"><text:span text:style-name="T161">Add Stream: </text:span><text:span text:style-name="T160">Adds a stream to the Stream </text:span><text:span text:style-name="T163">Table</text:span></text:p>
      <text:p text:style-name="P114"><text:span text:style-name="T161"/></text:p>
      <text:p text:style-name="P114"><text:span text:style-name="T161">Remove Stream: </text:span><text:span text:style-name="T160">Removes a stream to the Stream </text:span><text:span text:style-name="T163">Table</text:span><text:span text:style-name="T160">.</text:span></text:p>
      <text:p text:style-name="P113"><text:span text:style-name="T161"/></text:p>
      <text:p text:style-name="P113"><text:span text:style-name="T161">Start Stream: </text:span><text:span text:style-name="T160">Starts the Selected stream.</text:span></text:p>
      <text:p text:style-name="P113"><text:span text:style-name="T161"/></text:p>
      <text:p text:style-name="P113"><text:span text:style-name="T161">Stop Stream: </text:span><text:span text:style-name="T160">Stops the Selected stream.</text:span></text:p>
      <text:p text:style-name="P113"><text:span text:style-name="T161"/></text:p>
      <text:p text:style-name="P113"><text:span text:style-name="T161">Start All Streams: </text:span><text:span text:style-name="T160">Starts ALL streams.</text:span></text:p>
      <text:p text:style-name="P113"><text:span text:style-name="T161"/></text:p>
      <text:p text:style-name="P113"><text:span text:style-name="T161">Stop All Streams: <text:s/></text:span><text:span text:style-name="T160">Stops ALL streams.</text:span></text:p>
      <text:p text:style-name="P113"><text:span text:style-name="T161"/></text:p>
      <text:p text:style-name="P113"><text:span text:style-name="T164">FFMpeg</text:span><text:span text:style-name="T161"> Stream Logging: </text:span><text:span text:style-name="T160">Shows the output of </text:span><text:span text:style-name="T118">FMpeg</text:span><text:span text:style-name="T160"> during encoding/streaming.</text:span></text:p>
      <text:p text:style-name="P115"><text:span text:style-name="T161"/></text:p>
      <text:p text:style-name="P115"><text:span text:style-name="T161">RTMP URL: </text:span><text:span text:style-name="T160">RTMP URL.</text:span></text:p>
      <text:p text:style-name="P116"/>
      <text:p text:style-name="P116"><text:span text:style-name="T165">R</text:span>ecord Input:</text:p>
      <text:p text:style-name="P116"/>
      <text:p text:style-name="P116"><text:span text:style-name="T165">O</text:span>utput Folder:</text:p>
      <text:p text:style-name="P116"/>
      <text:p text:style-name="P116">Record Filename:</text:p>
      <text:p text:style-name="P116"/>
      <text:p text:style-name="P116">Recording Input Selector:</text:p>
      <text:p text:style-name="P116"/>
      <text:p text:style-name="P116">Preview Input:</text:p>
      <text:p text:style-name="P116"/>
      <text:p text:style-name="P116">Start/Stop Recording (Toggle):</text:p>
      <text:p text:style-name="P105"/>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text:span text:style-name="T166">Global Settings</text:span> <text:span text:style-name="T167">and Service </text:span>tab</text:p>
      <text:p text:style-name="P105"><draw:frame draw:style-name="fr1" draw:name="Image7" text:anchor-type="char" svg:x="0.0382in" svg:y="0in" svg:width="4.7437in" svg:height="3.1543in" draw:z-index="7"><draw:image xlink:href="Pictures/100000010000045800000307821C3287.png" xlink:type="simple" xlink:show="embed" xlink:actuate="onLoad" draw:mime-type="image/png"/></draw:frame></text:p>
      <text:p text:style-name="P118"><text:span text:style-name="T168">Company Name:</text:span><text:span text:style-name="T54"> </text:span><text:span text:style-name="T169">(Optional) Enter your company name here.</text:span></text:p>
      <text:p text:style-name="P119"><text:span text:style-name="T169">Include in Metadata:</text:span><text:span text:style-name="T54"> </text:span><text:span text:style-name="T169">This will include your company name in all metadata of converted files (Not yet enabled).</text:span></text:p>
      <text:p text:style-name="P120"/>
      <text:p text:style-name="P119"><text:span text:style-name="T170">File Copy</text:span><text:span text:style-name="T168"> Delay </text:span><text:span text:style-name="T170">(Previously Apple Delay)</text:span><text:span text:style-name="T54">: </text:span><text:span text:style-name="T169">This is deprecated and left in for backwards compatibility. </text:span></text:p>
      <text:p text:style-name="P121"/>
      <text:p text:style-name="P121"><text:span text:style-name="T116">Default Factory: </text:span><text:span text:style-name="T117">Chooses a default Factory that is loaded whenever FreeFactoryQT is started (optional).</text:span></text:p>
      <text:p text:style-name="P122"/>
      <text:p text:style-name="P121"><text:span text:style-name="T116">Factories Path: </text:span><text:span text:style-name="T117">This allows users to move the Factories folder to a </text:span><text:span text:style-name="T171">different</text:span><text:span text:style-name="T117"> </text:span><text:span text:style-name="T171">location </text:span><text:span text:style-name="T117">or </text:span><text:span text:style-name="T171">switch between</text:span><text:span text:style-name="T117"> multiple folders.</text:span></text:p>
      <text:p text:style-name="P123"/>
      <text:p text:style-name="P124"><text:span text:style-name="T116">Default </text:span><text:span text:style-name="T172">Output Path:</text:span><text:span text:style-name="T116"> </text:span>Choose a default <text:span text:style-name="T55">output folder.</text:span> <text:span text:style-name="T55">This is used when creating a New Factory on the Factory Builder tab</text:span>.</text:p>
      <text:p text:style-name="P121"><text:span text:style-name="T116"/></text:p>
      <text:p text:style-name="P121"><text:span text:style-name="T173">FFMpeg</text:span><text:span text:style-name="T116"> Path: </text:span><text:span text:style-name="T117">Defaults to /usr/bin but can be changed to ie. /usr/local/bin.</text:span></text:p>
      <text:p text:style-name="P125"/>
      <text:p text:style-name="P126">Hardware Tuning/<text:span text:style-name="T174">Max Concurrent Jobs: </text:span><text:span text:style-name="T175">This sets the maximum number of rendering jobs that can be processed in parallel. </text:span></text:p>
      <text:p text:style-name="P127">Add together the Max GPU + CPU and set this number to the total. </text:p>
      <text:p text:style-name="P128"/>
      <text:p text:style-name="P128">Hardware Tuning/<text:span text:style-name="T174">CPU Max Concurrent Jobs: </text:span><text:span text:style-name="T175">This is the maximum CPU limit. If you only process audio files, this can be quite high.</text:span></text:p>
      <text:p text:style-name="P128"/>
      <text:p text:style-name="P128">Hardware Tuning/<text:span text:style-name="T174">GPU Max Concurrent Jobs: </text:span><text:span text:style-name="T175">This sets the maximum GPU limit. For GeForce cards using NVENC, this usually can be set to 2 or 3 </text:span><text:span text:style-name="T176">on modern cards, but should be set to 1 on older cards</text:span><text:span text:style-name="T175">. If you have a Quadro, check your card documentation. </text:span></text:p>
      <text:p text:style-name="P121"><text:span text:style-name="T116"/></text:p>
      <text:p text:style-name="P121"><text:span text:style-name="T116">FreeFactory Notify Folders: </text:span><text:span text:style-name="T117">Allows multiple watched folders. Useful for network shares.</text:span></text:p>
      <text:p text:style-name="P121"><text:span text:style-name="T116"/></text:p>
      <text:p text:style-name="P121"><text:span text:style-name="T116">FreeFactory Service Status: <text:s/></text:span><text:span text:style-name="T117">This shows the status of the FreeFactory-Notify service. </text:span><text:span text:style-name="T177">You must click Update Status to populate. All the control buttons below will also populate this window.</text:span></text:p>
      <text:p text:style-name="P121"><text:span text:style-name="T116"/></text:p>
      <text:p text:style-name="P121"><text:span text:style-name="T116">Start (service): </text:span><text:span text:style-name="T177">FreeFactory-Notify service control. </text:span></text:p>
      <text:p text:style-name="P129"><text:span text:style-name="T116"/></text:p>
      <text:p text:style-name="P129"><text:span text:style-name="T116">Restart: (service): </text:span><text:span text:style-name="T177">FreeFactory-Notify service control. </text:span></text:p>
      <text:p text:style-name="P129"><text:span text:style-name="T116"/></text:p>
      <text:p text:style-name="P129"><text:span text:style-name="T116">Update Status: </text:span><text:span text:style-name="T177">FreeFactory-Notify service control. </text:span></text:p>
      <text:p text:style-name="P129"><text:span text:style-name="T116"/></text:p>
      <text:p text:style-name="P129"><text:span text:style-name="T116">Stop (service): </text:span><text:span text:style-name="T177">FreeFactory-Notify service control. </text:span></text:p>
      <text:p text:style-name="P129"><text:span text:style-name="T116"/></text:p>
      <text:p text:style-name="P129"><text:soft-page-break/><text:span text:style-name="T116">Kill (service): </text:span><text:span text:style-name="T177">FreeFactory-Notify service control. </text:span></text:p>
      <text:p text:style-name="P121"><text:span text:style-name="T116"/></text:p>
      <text:p text:style-name="P121"><text:span text:style-name="T116">Clear: <text:s/></text:span><text:span text:style-name="T177">Clears the Status Window. </text:span></text:p>
      <text:p text:style-name="P121"><text:span text:style-name="T177"/></text:p>
      <text:p text:style-name="P130"><text:span text:style-name="T5">FFMpeg</text:span> Help tab</text:p>
      <text:p text:style-name="P131"><draw:frame draw:style-name="fr1" draw:name="Image8" text:anchor-type="char" svg:x="-0.0016in" svg:y="0.011in" svg:width="4.7457in" svg:height="3.1445in" draw:z-index="8"><draw:image xlink:href="Pictures/10000000000004ED000002F06A597ECB.png" xlink:type="simple" xlink:show="embed" xlink:actuate="onLoad" draw:mime-type="image/png"/></draw:frame><text:line-break/><text:span text:style-name="T178">This tab gives you full access to the </text:span><text:span text:style-name="T5">FFMpeg</text:span><text:span text:style-name="T178"> built-in help with filtering. It literally pulls this from </text:span><text:span text:style-name="T5">FFMpeg</text:span><text:span text:style-name="T178"> itself so you will absolutely know what YOUR installed version provides. </text:span></text:p>
      <text:p text:style-name="P131"/>
      <text:p text:style-name="P130"/>
      <text:p text:style-name="P130"/>
      <text:p text:style-name="P130">DepPage tab</text:p>
      <text:p text:style-name="P131">This tab is not for general use and is only a place holder for <text:span text:style-name="T174">experimental/</text:span>deprecated widgets. Please do not use. It will be removed once we get to a stable release.</text:p>
      <text:p text:style-name="P131"/>
      <text:p text:style-name="P131"/>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text:soft-page-break/>FreeFactory Factory Tools App</text:p>
      <text:p text:style-name="P133"><draw:frame draw:style-name="fr1" draw:name="Image9" text:anchor-type="char" svg:x="0.0146in" svg:y="0.1445in" svg:width="4.4102in" svg:height="2.4799in" draw:z-index="9"><draw:image xlink:href="Pictures/10000000000002AB00000180D6588452.png" xlink:type="simple" xlink:show="embed" xlink:actuate="onLoad" draw:mime-type="image/png"/></draw:frame><text:span text:style-name="Source_20_Text"><text:span text:style-name="T179">The Factory Tools app allows for Factory Management. This allows you to Import/Export and Backup your Factories. It also does limited integrity testing and checks for duplicate Notify folders (these all have to be unique).</text:span></text:span></text:p>
      <text:p text:style-name="P133"><text:span text:style-name="Source_20_Text"><text:span text:style-name="T180">Factory Manager Section:</text:span></text:span></text:p>
      <text:p text:style-name="P133"><text:span text:style-name="Source_20_Text"><text:span text:style-name="T180"/></text:span></text:p>
      <text:p text:style-name="P134"><text:span text:style-name="Source_20_Text"><text:span text:style-name="T181">Import Factory</text:span></text:span><text:span text:style-name="Source_20_Text"><text:span text:style-name="T182">: <text:s/></text:span></text:span><text:span text:style-name="Source_20_Text"><text:span text:style-name="T183">Clicking this will allow you to import a Factory. You may multi-selected imported files. </text:span></text:span><text:span text:style-name="Source_20_Text"><text:span text:style-name="T184">If you import a file that has the same name as one you already have, it will get a new suffix and not overwrite your existing factory.</text:span></text:span></text:p>
      <text:p text:style-name="P134"><text:span text:style-name="Source_20_Text"><text:span text:style-name="T181"/></text:span></text:p>
      <text:p text:style-name="P134"><text:span text:style-name="Source_20_Text"><text:span text:style-name="T181">Export Factory:</text:span></text:span><text:span text:style-name="Source_20_Text"><text:span text:style-name="T183"> This will allow exporting factories either as flat files or a zipped file. You may select multiple factories for exporting. </text:span></text:span><text:span text:style-name="Source_20_Text"><text:span text:style-name="T184">As a security feature, when exporting, all PATHS will be cleared as well as any passwords and streaming paths/filenames. </text:span></text:span><text:span text:style-name="Source_20_Text"><text:span text:style-name="T185">You can of course </text:span></text:span><text:span text:style-name="Source_20_Text"><text:span text:style-name="T186">export</text:span></text:span><text:span text:style-name="Source_20_Text"><text:span text:style-name="T185"> to where ever you like.</text:span></text:span></text:p>
      <text:p text:style-name="P134"><text:span text:style-name="Source_20_Text"><text:span text:style-name="T187"/></text:span></text:p>
      <text:p text:style-name="P134"><text:span text:style-name="Source_20_Text"><text:span text:style-name="T187">Backup Factories:</text:span></text:span><text:span text:style-name="Source_20_Text"><text:span text:style-name="T184"> This will backup you</text:span></text:span><text:span text:style-name="Source_20_Text"><text:span text:style-name="T188">r</text:span></text:span><text:span text:style-name="Source_20_Text"><text:span text:style-name="T184"> entire Factories folder as a .zip file.</text:span></text:span></text:p>
      <text:p text:style-name="P134"><text:span text:style-name="Source_20_Text"><text:span text:style-name="T187"/></text:span></text:p>
      <text:p text:style-name="P134"><text:span text:style-name="Source_20_Text"><text:span text:style-name="T187">Check Factory Integrity: </text:span></text:span><text:span text:style-name="Source_20_Text"><text:span text:style-name="T184">This checks the Factory for malformed keys.</text:span></text:span></text:p>
      <text:p text:style-name="P134"><text:span text:style-name="Source_20_Text"><text:span text:style-name="T187"/></text:span></text:p>
      <text:p text:style-name="P134"><text:span text:style-name="Source_20_Text"><text:span text:style-name="T187">Check for NotifyDirectory Dups: </text:span></text:span><text:span text:style-name="Source_20_Text"><text:span text:style-name="T184">This will scan your entire Factories folder and check for any duplicate Notify Folders. Each one must be unique. </text:span></text:span></text:p>
      <text:p text:style-name="P134"><text:span text:style-name="Source_20_Text"><text:span text:style-name="T189"/></text:span></text:p>
      <text:p text:style-name="P134"><text:span text:style-name="Source_20_Text"><text:span text:style-name="T189">Factory Migration Section:</text:span></text:span></text:p>
      <text:p text:style-name="P134"><text:span text:style-name="Source_20_Text"><text:span text:style-name="T187">Factory Folder: </text:span></text:span><text:span text:style-name="Source_20_Text"><text:span text:style-name="T184">Select the Factory Folder you wish to use. Usually /opt/FreeFactory/Factories but this is optional.</text:span></text:span></text:p>
      <text:p text:style-name="P134"><text:span text:style-name="Source_20_Text"><text:span text:style-name="T187"/></text:span></text:p>
      <text:p text:style-name="P134"><text:span text:style-name="Source_20_Text"><text:span text:style-name="T187">Add Key(s): </text:span></text:span><text:span text:style-name="Source_20_Text"><text:span text:style-name="T184">Adds new Factory Keys to the Factory File. Ie: MANUALOPTIONSOUTPUT,NEWKEY2,ETC</text:span></text:span></text:p>
      <text:p text:style-name="P134"><text:span text:style-name="Source_20_Text"><text:span text:style-name="T187"/></text:span></text:p>
      <text:p text:style-name="P134"><text:span text:style-name="Source_20_Text"><text:span text:style-name="T187">Set Keys(s): </text:span></text:span><text:span text:style-name="Source_20_Text"><text:span text:style-name="T184">Sets an already existing Key to a value. Ie:</text:span></text:span><text:span text:style-name="Source_20_Text"><text:span text:style-name="T187"> </text:span></text:span><text:span text:style-name="Source_20_Text"><text:span text:style-name="T184">MANUALOPTIONSOUTPUT=-comment “Created with FreeFactory”</text:span></text:span></text:p>
      <text:p text:style-name="P134"><text:span text:style-name="Source_20_Text"><text:span text:style-name="T187"/></text:span></text:p>
      <text:p text:style-name="P134"><text:span text:style-name="Source_20_Text"><text:span text:style-name="T187">Remove Key(s): </text:span></text:span><text:span text:style-name="Source_20_Text"><text:span text:style-name="T184">Removes the Key from the Factory.</text:span></text:span></text:p>
      <text:p text:style-name="P134"><text:span text:style-name="Source_20_Text"><text:span text:style-name="T187"/></text:span></text:p>
      <text:p text:style-name="P134"><text:span text:style-name="Source_20_Text"><text:span text:style-name="T187">Rename Key(s): </text:span></text:span><text:span text:style-name="Source_20_Text"><text:span text:style-name="T184">Renames the Factory Key. </text:span></text:span></text:p>
      <text:p text:style-name="P134"><text:span text:style-name="Source_20_Text"><text:span text:style-name="T187"/></text:span></text:p>
      <text:p text:style-name="P134"><text:span text:style-name="Source_20_Text"><text:span text:style-name="T187">Dry Run:</text:span></text:span><text:span text:style-name="Source_20_Text"><text:span text:style-name="T184"> Will show you what will be done without actually doing anything.</text:span></text:span></text:p>
      <text:p text:style-name="P134"><text:span text:style-name="Source_20_Text"><text:span text:style-name="T187"/></text:span></text:p>
      <text:p text:style-name="P134"><text:span text:style-name="Source_20_Text"><text:span text:style-name="T187">Create Backup:</text:span></text:span><text:span text:style-name="Source_20_Text"><text:span text:style-name="T184"> Will first backup all your factories by appending a .bak at the end, before performing any actual operations.</text:span></text:span></text:p>
      <text:p text:style-name="P134"><text:span text:style-name="Source_20_Text"><text:span text:style-name="T187"/></text:span></text:p>
      <text:p text:style-name="P134"><text:span text:style-name="Source_20_Text"><text:span text:style-name="T187">Make it So:</text:span></text:span><text:span text:style-name="Source_20_Text"><text:span text:style-name="T184"> Runs the job.</text:span></text:span></text:p>
      <text:p text:style-name="P134"><text:span text:style-name="Source_20_Text"><text:span text:style-name="T187"/></text:span></text:p>
      <text:p text:style-name="P134"><text:span text:style-name="Source_20_Text"><text:span text:style-name="T187">Factory List:</text:span></text:span><text:span text:style-name="Source_20_Text"><text:span text:style-name="T184"> Displays your current and selected Factory folder. You may multi-select from this list when doing Exports. You can also double click a Factory to preview it (but you cannot edit it).</text:span></text:span></text:p>
      <text:p text:style-name="P134"><text:span text:style-name="Source_20_Text"><text:span text:style-name="T190"/></text:span></text:p>
      <text:p text:style-name="P131"/>
      <text:p text:style-name="P135"/>
      <text:p text:style-name="P135"><text:soft-page-break/><text:span text:style-name="T191">What the heck is the </text:span>FreeFacto<text:span text:style-name="T191">ry service and do I need it?</text:span></text:p>
      <text:p text:style-name="P136"/>
      <text:p text:style-name="P137">The FreeFactory service is mostly useful for professionals <text:span text:style-name="T192">and power users</text:span> with multiple users and multiple “drop” folders, one per Factory. Depending on which folder a file is dropped into, the file gets picked up and converted according to the settings of one factory <text:span text:style-name="T174">with a Notify folder assigned</text:span>. Each folder can have only <text:span text:style-name="T174">one unique Notify</text:span> <text:span text:style-name="T174">folder </text:span>assigned to it <text:span text:style-name="T174">(you can check for duplicates using the newly added Factory Tools app)</text:span>. This is a simple example of a useful directory tree for drop folders:</text:p>
      <text:p text:style-name="P137"/>
      <text:p text:style-name="P137"/>
      <text:p text:style-name="P137"/>
      <text:p text:style-name="P137"/>
      <text:p text:style-name="P138"><text:span text:style-name="T193"># tree /video </text:span><text:span text:style-name="T194"><text:line-break/></text:span><text:span text:style-name="T195">/video</text:span><text:span text:style-name="T193"> </text:span><text:span text:style-name="T194"><text:line-break/></text:span><text:span text:style-name="T193">├── 844938.mxf </text:span><text:span text:style-name="T194"><text:line-break/></text:span><text:span text:style-name="T193">├── </text:span><text:span text:style-name="T195">dropbox</text:span><text:span text:style-name="T193"> </text:span><text:span text:style-name="T194"><text:line-break/></text:span><text:span text:style-name="T193">│   ├── </text:span><text:span text:style-name="T196">1080-MP4</text:span><text:span text:style-name="T193"> </text:span><text:span text:style-name="T194"><text:line-break/></text:span><text:span text:style-name="T193">│   ├── </text:span><text:span text:style-name="T196">1080-MP4-HEVC-265</text:span><text:span text:style-name="T193"> </text:span><text:span text:style-name="T194"><text:line-break/></text:span><text:span text:style-name="T193">│   ├── </text:span><text:span text:style-name="T196">1080-MP4-NVENC-264</text:span><text:span text:style-name="T193"> </text:span><text:span text:style-name="T194"><text:line-break/></text:span><text:span text:style-name="T193">│   ├── </text:span><text:span text:style-name="T196">720P-MP4</text:span><text:span text:style-name="T193"> </text:span><text:span text:style-name="T194"><text:line-break/></text:span><text:span text:style-name="T193">│   ├── </text:span><text:span text:style-name="T196">Audio2FLAC</text:span><text:span text:style-name="T193"> </text:span><text:span text:style-name="T194"><text:line-break/></text:span><text:span text:style-name="T193">│   ├── </text:span><text:span text:style-name="T196">Audio2MP3-320</text:span><text:span text:style-name="T193"> </text:span><text:span text:style-name="T194"><text:line-break/></text:span><text:span text:style-name="T193">│   ├── </text:span><text:span text:style-name="T196">Audio2Wav</text:span><text:span text:style-name="T193"> </text:span><text:span text:style-name="T194"><text:line-break/></text:span><text:span text:style-name="T193">│   ├── </text:span><text:span text:style-name="T196">photos</text:span><text:span text:style-name="T193"> </text:span><text:span text:style-name="T194"><text:line-break/></text:span><text:span text:style-name="T193">│   ├── </text:span><text:span text:style-name="T196">Testing</text:span><text:span text:style-name="T193"> </text:span><text:span text:style-name="T194"><text:line-break/></text:span><text:span text:style-name="T193">│   ├── </text:span><text:span text:style-name="T196">To-MKV</text:span><text:span text:style-name="T193"> </text:span><text:span text:style-name="T194"><text:line-break/></text:span><text:span text:style-name="T193">│   └── </text:span><text:span text:style-name="T196">WDTV-1</text:span><text:span text:style-name="T193"> </text:span><text:span text:style-name="T194"><text:line-break/></text:span><text:span text:style-name="T193">└── </text:span><text:span text:style-name="T197">Track07.mp3</text:span><text:line-break/><text:line-break/><text:span text:style-name="T198">Of course </text:span><text:span text:style-name="T199">the directory</text:span><text:span text:style-name="T198"> permissions </text:span><text:span text:style-name="T199">must be set </text:span><text:span text:style-name="T198">correctly for all users to have access to which folders they will need, </text:span><text:span text:style-name="T199">and also the output folders as well. All these are configured in the Factory Builder tab. Many of the included example Factories will use one of these folders as the Notify Directory and the /video root for the destination. </text:span></text:p>
      <text:p text:style-name="P138"><text:span text:style-name="T199"/></text:p>
      <text:p text:style-name="P139"><text:span text:style-name="T198">The FreeFactory-notify service runs a “watch” script </text:span><text:span text:style-name="T200">(FreeFactoryNotifyRunner.sh) </text:span><text:span text:style-name="T198">which uses inotifywait to watch all these folders within the /video folder. Whenever a file is dropped or copied into a watched folder, the script then runs FreeFactoryConversion.tcl and encodes the file according the Factory that is assigned to the folder. Since this completely runs in the background, it can be left running just as any other service. </text:span><text:span text:style-name="T200">When using the FreeFactory-notify service, there is no need to have the FreeFactoryQT front end running at all unless you are building and/or testing new Factories.</text:span></text:p>
      <text:p text:style-name="P139"><text:span text:style-name="T198"/></text:p>
      <text:p text:style-name="P139"><text:span text:style-name="T198">If you are indeed allowing multiple users to access these drop folders, then you should run the service system-side, as root. This is one of the options provided when running the service installer script. You can still control the </text:span><text:span text:style-name="T200">(root) </text:span><text:span text:style-name="T198">service as a user, but it will ask for a sudo password if you need to control it.</text:span></text:p>
      <text:p text:style-name="P139"><text:span text:style-name="T198"/></text:p>
      <text:p text:style-name="P140">You can also control the service using the normal systemctl program.</text:p>
      <text:p text:style-name="P139"><text:span text:style-name="T198"/></text:p>
      <text:p text:style-name="P141">This is the order the service launches a conversion job:</text:p>
      <text:p text:style-name="P142">FreeFactory-notify.service &gt;&gt; FreeFactoryNotifyRunner.sh &gt;&gt; FreeFactoryNotify.sh &gt;&gt; FreeFactoryConversion.tcl</text:p>
      <text:p text:style-name="P139"><text:span text:style-name="T198"/></text:p>
      <text:p text:style-name="P143"><text:span text:style-name="T52">IMPORTANT:</text:span> The FreeFactoryConversion.<text:span text:style-name="T174">py</text:span> program will process all dropped files in parallel launching a new <text:span text:style-name="T5">FFMpeg</text:span> instance for each file dropped. If you expect a lot of files being dropped, either have a very beefy server with lots of memory and a capable CPU/GPU for handling lots of rendering traffic, or don’t drop too many at once. This will vary from system to system. <text:span text:style-name="T201">Dropping more files than your system can handle will create very long encode times, </text:span><text:span text:style-name="T202">or worse, crash your rendering server. </text:span></text:p>
      <text:p text:style-name="P144">EDIT: The above has been negated by the addition of the Hardware Tuning section above.</text:p>
      <text:p text:style-name="P105"/>
      <text:p text:style-name="P145"><text:span text:style-name="T174">Setting up the </text:span>FreeFactory Service:</text:p>
      <text:h text:style-name="P146" text:outline-level="3">Setting up FreeFactory service:</text:h>
      <text:p text:style-name="P147">This requires <text:span text:style-name="T174">inotifywait</text:span> installed on your system.</text:p>
      <text:p text:style-name="P147">Simply run the script setup-notifyservice.sh.</text:p>
      <text:p text:style-name="P148"><text:span text:style-name="Source_20_Text"><text:span text:style-name="T194">$ ./setup-notifyservice.sh </text:span></text:span></text:p>
      <text:p text:style-name="P148"><text:soft-page-break/><text:span text:style-name="Source_20_Text"><text:span text:style-name="T194">🔧 FreeFactory Notify Service Setup</text:span></text:span></text:p>
      <text:p text:style-name="P148"><text:span text:style-name="Source_20_Text"><text:span text:style-name="T194">----------------------------------</text:span></text:span></text:p>
      <text:p text:style-name="P148"><text:span text:style-name="Source_20_Text"><text:span text:style-name="T194">🔍 Checking if the service is currently running...</text:span></text:span></text:p>
      <text:p text:style-name="P148"><text:span text:style-name="Source_20_Text"><text:span text:style-name="T194">✅ Service is not currently running.</text:span></text:span></text:p>
      <text:p text:style-name="P148"><text:span text:style-name="Source_20_Text"><text:span text:style-name="T194"/></text:span></text:p>
      <text:p text:style-name="P148"><text:span text:style-name="Source_20_Text"><text:span text:style-name="T194">📂 Installed in USER mode</text:span></text:span></text:p>
      <text:p text:style-name="P148"><text:span text:style-name="Source_20_Text"><text:span text:style-name="T194"/></text:span></text:p>
      <text:p text:style-name="P148"><text:span text:style-name="Source_20_Text"><text:span text:style-name="T194">Choose an action:</text:span></text:span></text:p>
      <text:p text:style-name="P148"><text:span text:style-name="Source_20_Text"><text:span text:style-name="T194">1) Install/enable in USER mode</text:span></text:span></text:p>
      <text:p text:style-name="P149"><text:span text:style-name="Source_20_Text"><text:span text:style-name="T194">2) Install/enable in SYSTEM-WIDE mode (</text:span></text:span><text:span text:style-name="Source_20_Text"><text:span text:style-name="T203">Requires root privileges via sudo</text:span></text:span><text:span text:style-name="Source_20_Text"><text:span text:style-name="T194">)</text:span></text:span></text:p>
      <text:p text:style-name="P148"><text:span text:style-name="Source_20_Text"><text:span text:style-name="T194">3) Uninstall from USER mode</text:span></text:span></text:p>
      <text:p text:style-name="P148"><text:span text:style-name="Source_20_Text"><text:span text:style-name="T194">4) Uninstall from SYSTEM-WIDE mode </text:span></text:span><text:span text:style-name="Source_20_Text"><text:span text:style-name="T203">(Requires root privileges via sudo)</text:span></text:span></text:p>
      <text:p text:style-name="P148"><text:span text:style-name="Source_20_Text"><text:span text:style-name="T194">5) Quit</text:span></text:span></text:p>
      <text:p text:style-name="P148"><text:span text:style-name="Source_20_Text"><text:span text:style-name="T194">Selection:</text:span></text:span></text:p>
      <text:p text:style-name="P148"><text:span text:style-name="Source_20_Text"><text:span text:style-name="T194"/></text:span></text:p>
      <text:p text:style-name="P148"><text:span text:style-name="Source_20_Text"><text:span text:style-name="T198">Unless you are running the FreeFactory service for a company environment, you will want to select USER mode.</text:span></text:span></text:p>
      <text:p text:style-name="P148"><text:span text:style-name="Source_20_Text"><text:span text:style-name="T194"/></text:span></text:p>
      <text:p text:style-name="P148"><text:span text:style-name="Source_20_Text"><text:span text:style-name="T198">Once setup, you can run:</text:span></text:span></text:p>
      <text:p text:style-name="P148"><text:span text:style-name="Source_20_Text"><text:span text:style-name="T194">systemctl --user start freefactory-notify.</text:span></text:span><text:span text:style-name="Source_20_Text"><text:span text:style-name="T204">service</text:span></text:span></text:p>
      <text:p text:style-name="P148"><text:span text:style-name="Source_20_Text"><text:span text:style-name="T198">and</text:span></text:span></text:p>
      <text:p text:style-name="P148"><text:span text:style-name="Source_20_Text"><text:span text:style-name="T194">systemctl --user enable freefactory-notify.</text:span></text:span><text:span text:style-name="Source_20_Text"><text:span text:style-name="T204">service</text:span></text:span></text:p>
      <text:p text:style-name="P148"><text:span text:style-name="Source_20_Text"><text:span text:style-name="T198">to start whenever the user logs in.</text:span></text:span></text:p>
      <text:p text:style-name="P148"><text:span text:style-name="Source_20_Text"><text:span text:style-name="T194"/></text:span></text:p>
      <text:p text:style-name="P148"><text:span text:style-name="Source_20_Text"><text:span text:style-name="T198">You can also start and stop the service from within the FreeFactoryQT user interface.</text:span></text:span></text:p>
      <text:p text:style-name="P150"/>
      <text:p text:style-name="P151"><text:span text:style-name="Source_20_Text"><text:span text:style-name="T205"/></text:span></text:p>
      <text:p text:style-name="P151"><text:span text:style-name="Source_20_Text"><text:span text:style-name="T206">Converting</text:span></text:span><text:span text:style-name="Source_20_Text"><text:span text:style-name="T205"> </text:span></text:span><text:span text:style-name="Source_20_Text"><text:span text:style-name="T206">Files using </text:span></text:span><text:span text:style-name="Source_20_Text"><text:span text:style-name="T205">Multiple Factories through Watched Drop Folders (Service Only)</text:span></text:span></text:p>
      <text:p text:style-name="P151"><text:span text:style-name="Source_20_Text"><text:span text:style-name="T207"/></text:span></text:p>
      <text:p text:style-name="P151"><text:span text:style-name="Source_20_Text"><text:span text:style-name="T207">Sometimes it’s just not possible to end up with a file format you need with only one encoding pass. </text:span></text:span><text:span text:style-name="Source_20_Text"><text:span text:style-name="T208">This can easily be done by simply setting the output folder of Factory “A” to the Watched (input) folder of Factory “B”. <text:s/>Once Factory A completes the file, Factory B will then pick it up for additional processing and deliver to the output folder set in Factory B. This output folder can not be a watched folder. </text:span></text:span><text:span text:style-name="Source_20_Text"><text:span text:style-name="T209">You can </text:span></text:span><text:span text:style-name="Source_20_Text"><text:span text:style-name="T210">stack</text:span></text:span><text:span text:style-name="Source_20_Text"><text:span text:style-name="T209"> as many factories together in this manner as you need, but more than two might become confusing. </text:span></text:span><text:span text:style-name="Source_20_Text"><text:span text:style-name="T211"><text:s/></text:span></text:span></text:p>
      <text:p text:style-name="P151"><text:span text:style-name="Source_20_Text"><text:span text:style-name="T208"/></text:span></text:p>
      <text:p text:style-name="P152"><text:span text:style-name="Source_20_Text"><text:span text:style-name="T208">One example use of this would be to convert </text:span></text:span><text:span text:style-name="Source_20_Text"><text:span text:style-name="T212">a </text:span></text:span><text:span text:style-name="Source_20_Text"><text:span text:style-name="T208">.wav file to a .flac with a different codec. e.g. Converting a 32bit .wav to a 16bit or 24bit .flac. Since flac is </text:span></text:span><text:span text:style-name="Source_20_Text"><text:span text:style-name="T212">considered </text:span></text:span><text:span text:style-name="Source_20_Text"><text:span text:style-name="T208">an audio codec </text:span></text:span><text:span text:style-name="Source_20_Text"><text:span text:style-name="T212">in </text:span></text:span><text:span text:style-name="Source_20_Text"><text:span text:style-name="T213">FFMpeg</text:span></text:span><text:span text:style-name="Source_20_Text"><text:span text:style-name="T208">, you cannot also choose for instance codec pcm_s16le and directly convert it </text:span></text:span><text:span text:style-name="Source_20_Text"><text:span text:style-name="T212">in</text:span></text:span><text:span text:style-name="Source_20_Text"><text:span text:style-name="T208">to a 16bit .flac file. You must convert it using the pcm_* codec first before creating the flac file. </text:span></text:span></text:p>
      <text:p text:style-name="P152"><text:span text:style-name="Source_20_Text"><text:span text:style-name="T208"/></text:span></text:p>
      <text:p text:style-name="P152"><text:span text:style-name="Source_20_Text"><text:span text:style-name="T208">Factory A would convert the 32bit input file to a pcm_s16le (or s24le) and deliver to a watched folder for creating FLAC files. Once the converted WAV is completed and arriving at Factory B’s watched folder, it will again be picked up and converted to FLAC maintaining the previously rendered 16bit file and compress it into a .flac file. </text:span></text:span></text:p>
      <text:p text:style-name="P152"><text:span text:style-name="Source_20_Text"><text:span text:style-name="T208"/></text:span></text:p>
      <text:p text:style-name="P152"><text:span text:style-name="Source_20_Text"><text:span text:style-name="T208"/></text:span></text:p>
      <text:p text:style-name="P152"><text:span text:style-name="Source_20_Text"><text:span text:style-name="T208"/></text:span></text:p>
      <text:p text:style-name="P153"><text:span text:style-name="Source_20_Text"><text:span text:style-name="T214"/></text:span></text:p>
      <text:p text:style-name="P153"><text:span text:style-name="Source_20_Text"><text:span text:style-name="T214"/></text:span></text:p>
      <text:p text:style-name="P153"><text:span text:style-name="Source_20_Text"><text:span text:style-name="T214"/></text:span></text:p>
      <text:p text:style-name="P153"><text:span text:style-name="Source_20_Text"><text:span text:style-name="T214"/></text:span></text:p>
      <text:p text:style-name="P153"><text:span text:style-name="Source_20_Text"><text:span text:style-name="T214"/></text:span></text:p>
      <text:p text:style-name="P153"><text:span text:style-name="Source_20_Text"><text:span text:style-name="T214"/></text:span></text:p>
      <text:p text:style-name="P153"><text:span text:style-name="Source_20_Text"><text:span text:style-name="T214"/></text:span></text:p>
      <text:p text:style-name="P153"><text:span text:style-name="Source_20_Text"><text:span text:style-name="T214"/></text:span></text:p>
      <text:p text:style-name="P153"><text:span text:style-name="Source_20_Text"><text:span text:style-name="T214"/></text:span></text:p>
      <text:p text:style-name="P153"><text:span text:style-name="Source_20_Text"><text:span text:style-name="T214"/></text:span></text:p>
      <text:p text:style-name="P153"><text:span text:style-name="Source_20_Text"><text:span text:style-name="T214"/></text:span></text:p>
      <text:p text:style-name="P153"><text:span text:style-name="Source_20_Text"><text:span text:style-name="T214"/></text:span></text:p>
      <text:p text:style-name="P153"><text:span text:style-name="Source_20_Text"><text:span text:style-name="T214"/></text:span></text:p>
      <text:p text:style-name="P153"><text:span text:style-name="Source_20_Text"><text:span text:style-name="T214"/></text:span></text:p>
      <text:p text:style-name="P153"><text:soft-page-break/><text:span text:style-name="Source_20_Text"><text:span text:style-name="T214">Included Sample Factories:</text:span></text:span></text:p>
      <text:p text:style-name="P153"><text:span text:style-name="Source_20_Text"><text:span text:style-name="T215">FreeFactory includes several pre-built factories to help get you up and running quickly and give you some idea of what is expected in a functional factory. Please use these as a learning guide or even modify them to be your daily use factories. You will need to change any Notify and Output folders to match YOUR system as there were all built for mine.</text:span></text:span></text:p>
      <text:p text:style-name="P153"><text:span text:style-name="Source_20_Text"><text:span text:style-name="T216"/></text:span></text:p>
      <text:p text:style-name="P153"><text:span text:style-name="Source_20_Text"><text:span text:style-name="T216">5.1-to-6ch_discrete-MultiOutput:</text:span></text:span></text:p>
      <text:p text:style-name="P153"><text:span text:style-name="Source_20_Text"><text:span text:style-name="T217">Factory Type:</text:span></text:span><text:span text:style-name="Source_20_Text"><text:span text:style-name="T218"> Local Encode Multi-Output</text:span></text:span></text:p>
      <text:p text:style-name="P153"><text:span text:style-name="Source_20_Text"><text:span text:style-name="T215">This factory will convert any multichannel audio stream and break it down to individual .wav files. This is a local encode factory and should not be used with the FreeFactory Notify Service. It will accept most video files that includes a multi-channel audio stream whether it be A</text:span></text:span><text:span text:style-name="Source_20_Text"><text:span text:style-name="T219">A</text:span></text:span><text:span text:style-name="Source_20_Text"><text:span text:style-name="T215">C, AC3 or DTS or from audio files (.ac3, aac, m4a, dts).</text:span></text:span></text:p>
      <text:p text:style-name="P153"><text:span text:style-name="Source_20_Text"><text:span text:style-name="T215"/></text:span></text:p>
      <text:p text:style-name="P153"><text:span text:style-name="Source_20_Text"><text:span text:style-name="T216">AAC2AC3:</text:span></text:span></text:p>
      <text:p text:style-name="P153"><text:span text:style-name="Source_20_Text"><text:span text:style-name="T217">Factory Type:</text:span></text:span><text:span text:style-name="Source_20_Text"><text:span text:style-name="T218"> Local Encode and FreeFactory Service</text:span></text:span></text:p>
      <text:p text:style-name="P153"><text:span text:style-name="Source_20_Text"><text:span text:style-name="T215">Drop a video file with anything but ac3 audio and it will give you a new file which has ac3 audio @320Mb/s. You should be safe to keep the Video Codec in copy mode. Change any other parameters to suit your needs.</text:span></text:span></text:p>
      <text:p text:style-name="P153"><text:span text:style-name="Source_20_Text"><text:span text:style-name="T215"/></text:span></text:p>
      <text:p text:style-name="P153"><text:span text:style-name="Source_20_Text"><text:span text:style-name="T216"/></text:span></text:p>
      <text:p text:style-name="P153"><text:span text:style-name="Source_20_Text"><text:span text:style-name="T216">AnyAudioFiletoFLAC:</text:span></text:span></text:p>
      <text:p text:style-name="P153"><text:span text:style-name="Source_20_Text"><text:span text:style-name="T217">Factory Type:</text:span></text:span><text:span text:style-name="Source_20_Text"><text:span text:style-name="T218"> Local Encode and FreeFactory Service</text:span></text:span></text:p>
      <text:p text:style-name="P153"><text:span text:style-name="Source_20_Text"><text:span text:style-name="T215">This will convert any audio file to a FLAC with compression level 8. It will also strip out any embedded photos which may be present via the Disable Video checkbox. If you wish to keep embedded photos, uncheck this box and re-save the factory.</text:span></text:span></text:p>
      <text:p text:style-name="P153"><text:span text:style-name="Source_20_Text"><text:span text:style-name="T215"/></text:span></text:p>
      <text:p text:style-name="P153"><text:span text:style-name="Source_20_Text"><text:span text:style-name="T216">Audio-Two_track_mono_to_one_track:</text:span></text:span></text:p>
      <text:p text:style-name="P153"><text:span text:style-name="Source_20_Text"><text:span text:style-name="T217">Factory Type:</text:span></text:span><text:span text:style-name="Source_20_Text"><text:span text:style-name="T218"> Local Encode (optional FreeFactoryService)</text:span></text:span></text:p>
      <text:p text:style-name="P153"><text:span text:style-name="Source_20_Text"><text:span text:style-name="T215">This will take any two channel mono file and convert to a one channel mono file thus saving disc space. Also strips embedded photos. </text:span></text:span></text:p>
      <text:p text:style-name="P153"><text:span text:style-name="Source_20_Text"><text:span text:style-name="T215"/></text:span></text:p>
      <text:p text:style-name="P153"><text:span text:style-name="Source_20_Text"><text:span text:style-name="T216">Audio-Volume_Detect:</text:span></text:span></text:p>
      <text:p text:style-name="P153"><text:span text:style-name="Source_20_Text"><text:span text:style-name="T217">Factory Type:</text:span></text:span><text:span text:style-name="Source_20_Text"><text:span text:style-name="T218"> Local Encode</text:span></text:span></text:p>
      <text:p text:style-name="P153"><text:span text:style-name="Source_20_Text"><text:span text:style-name="T215">This </text:span></text:span><text:span text:style-name="Source_20_Text"><text:span text:style-name="T220">factory simply generates a list of peak volume levels </text:span></text:span><text:span text:style-name="Source_20_Text"><text:span text:style-name="T221">for audio files. Not really useful within FreeFactory at the moment as there is no mechanism to print out the text.</text:span></text:span></text:p>
      <text:p text:style-name="P153"><text:span text:style-name="Source_20_Text"><text:span text:style-name="T221"/></text:span></text:p>
      <text:p text:style-name="P154"><text:span text:style-name="Source_20_Text"><text:span text:style-name="T216">Audio2mp3-320:</text:span></text:span></text:p>
      <text:p text:style-name="P154"><text:span text:style-name="Source_20_Text"><text:span text:style-name="T217">Factory Type:</text:span></text:span><text:span text:style-name="Source_20_Text"><text:span text:style-name="T218"> Local Encode </text:span></text:span><text:span text:style-name="Source_20_Text"><text:span text:style-name="T222">and FreeFactory Service</text:span></text:span></text:p>
      <text:p text:style-name="P154"><text:span text:style-name="Source_20_Text"><text:span text:style-name="T215">This </text:span></text:span><text:span text:style-name="Source_20_Text"><text:span text:style-name="T220">factor</text:span></text:span><text:span text:style-name="Source_20_Text"><text:span text:style-name="T221">y does exactly what the description says. Converts any audio file to 320</text:span></text:span><text:span text:style-name="Source_20_Text"><text:span text:style-name="T219">k</text:span></text:span><text:span text:style-name="Source_20_Text"><text:span text:style-name="T221">b/s mp3 while stripping any embedded images.</text:span></text:span></text:p>
      <text:p text:style-name="P154"><text:span text:style-name="Source_20_Text"><text:span text:style-name="T221"/></text:span></text:p>
      <text:p text:style-name="P154"><text:span text:style-name="Source_20_Text"><text:span text:style-name="T216">Audio2</text:span></text:span><text:span text:style-name="Source_20_Text"><text:span text:style-name="T223">WAVConversion</text:span></text:span><text:span text:style-name="Source_20_Text"><text:span text:style-name="T216">:</text:span></text:span></text:p>
      <text:p text:style-name="P154"><text:span text:style-name="Source_20_Text"><text:span text:style-name="T217">Factory Type:</text:span></text:span><text:span text:style-name="Source_20_Text"><text:span text:style-name="T218"> Local Encode (optional FreeFactoryService)</text:span></text:span></text:p>
      <text:p text:style-name="P154"><text:span text:style-name="Source_20_Text"><text:span text:style-name="T215">This </text:span></text:span><text:span text:style-name="Source_20_Text"><text:span text:style-name="T220">factor</text:span></text:span><text:span text:style-name="Source_20_Text"><text:span text:style-name="T221">y does exactly what the description says. Converts any audio file to a s16le wav file.</text:span></text:span></text:p>
      <text:p text:style-name="P154"><text:span text:style-name="Source_20_Text"><text:span text:style-name="T221"/></text:span></text:p>
      <text:p text:style-name="P154"><text:span text:style-name="Source_20_Text"><text:span text:style-name="T223">AudioHD-2-wav_32-88200</text:span></text:span><text:span text:style-name="Source_20_Text"><text:span text:style-name="T216">:</text:span></text:span></text:p>
      <text:p text:style-name="P154"><text:span text:style-name="Source_20_Text"><text:span text:style-name="T217">Factory Type:</text:span></text:span><text:span text:style-name="Source_20_Text"><text:span text:style-name="T218"> Local Encode </text:span></text:span><text:span text:style-name="Source_20_Text"><text:span text:style-name="T222">and</text:span></text:span><text:span text:style-name="Source_20_Text"><text:span text:style-name="T218"> FreeFactoryService</text:span></text:span></text:p>
      <text:p text:style-name="P154"><text:span text:style-name="Source_20_Text"><text:span text:style-name="T221">This factory was created to convert DSD audio files to 32bit wav files.</text:span></text:span></text:p>
      <text:p text:style-name="P154"><text:span text:style-name="Source_20_Text"><text:span text:style-name="T221"/></text:span></text:p>
      <text:p text:style-name="P154"><text:span text:style-name="Source_20_Text"><text:span text:style-name="T223">AudioNormalizeDynamics</text:span></text:span><text:span text:style-name="Source_20_Text"><text:span text:style-name="T216">:</text:span></text:span></text:p>
      <text:p text:style-name="P154"><text:span text:style-name="Source_20_Text"><text:span text:style-name="T217">Factory Type:</text:span></text:span><text:span text:style-name="Source_20_Text"><text:span text:style-name="T218"> Local Encode </text:span></text:span></text:p>
      <text:p text:style-name="P154"><text:span text:style-name="Source_20_Text"><text:span text:style-name="T221">This factory is useful for cleaning up spoken voice dynamics. This will completely destroy music, but is great for spoken audio. </text:span></text:span></text:p>
      <text:p text:style-name="P154"><text:span text:style-name="Source_20_Text"><text:span text:style-name="T221"/></text:span></text:p>
      <text:p text:style-name="P155"><text:span text:style-name="Source_20_Text"><text:span text:style-name="T223">ClientConversion-720P</text:span></text:span><text:span text:style-name="Source_20_Text"><text:span text:style-name="T216">:</text:span></text:span></text:p>
      <text:p text:style-name="P155"><text:span text:style-name="Source_20_Text"><text:span text:style-name="T217">Factory Type:</text:span></text:span><text:span text:style-name="Source_20_Text"><text:span text:style-name="T218"> Local Encode </text:span></text:span><text:span text:style-name="Source_20_Text"><text:span text:style-name="T224">and FreeFactory Service</text:span></text:span></text:p>
      <text:p text:style-name="P155"><text:span text:style-name="Source_20_Text"><text:span text:style-name="T225">This was created to make 30 second television commercials email-able for client viewing. It does hardware encoding via the h264_nvenc codec <text:s/>@720P/1.5</text:span></text:span><text:span text:style-name="Source_20_Text"><text:span text:style-name="T219">k</text:span></text:span><text:span text:style-name="Source_20_Text"><text:span text:style-name="T225">b/s. </text:span></text:span></text:p>
      <text:p text:style-name="P153"><text:span text:style-name="Source_20_Text"><text:span text:style-name="T215"/></text:span></text:p>
      <text:p text:style-name="P155"><text:span text:style-name="Source_20_Text"><text:span text:style-name="T223">Downmix_6ch_to_stereo</text:span></text:span><text:span text:style-name="Source_20_Text"><text:span text:style-name="T216">:</text:span></text:span></text:p>
      <text:p text:style-name="P155"><text:span text:style-name="Source_20_Text"><text:span text:style-name="T217">Factory Type:</text:span></text:span><text:span text:style-name="Source_20_Text"><text:span text:style-name="T218"> Local Encode</text:span></text:span></text:p>
      <text:p text:style-name="P155"><text:soft-page-break/><text:span text:style-name="Source_20_Text"><text:span text:style-name="T225">This was created to convert multi-channel audio to stereo using only audio filters but still retaining the LFE channel (in the stereo mix).</text:span></text:span></text:p>
      <text:p text:style-name="P155"><text:span text:style-name="Source_20_Text"><text:span text:style-name="T225"/></text:span></text:p>
      <text:p text:style-name="P155"><text:span text:style-name="Source_20_Text"><text:span text:style-name="T223">DVCProHD-MOV</text:span></text:span><text:span text:style-name="Source_20_Text"><text:span text:style-name="T216">:</text:span></text:span></text:p>
      <text:p text:style-name="P155"><text:span text:style-name="Source_20_Text"><text:span text:style-name="T217">Factory Type:</text:span></text:span><text:span text:style-name="Source_20_Text"><text:span text:style-name="T218"> Local Encode (optional FreeFactoryService)</text:span></text:span></text:p>
      <text:p text:style-name="P155"><text:span text:style-name="Source_20_Text"><text:span text:style-name="T225">This is a very basic DVCProHD factory. Please modify to suit your needs. Outputs in .mov format.</text:span></text:span></text:p>
      <text:p text:style-name="P155"><text:span text:style-name="Source_20_Text"><text:span text:style-name="T225"/></text:span></text:p>
      <text:p text:style-name="P155"><text:span text:style-name="Source_20_Text"><text:span text:style-name="T223">DVCProHD-M</text:span></text:span><text:span text:style-name="Source_20_Text"><text:span text:style-name="T226">XF</text:span></text:span><text:span text:style-name="Source_20_Text"><text:span text:style-name="T216">:</text:span></text:span></text:p>
      <text:p text:style-name="P155"><text:span text:style-name="Source_20_Text"><text:span text:style-name="T217">Factory Type:</text:span></text:span><text:span text:style-name="Source_20_Text"><text:span text:style-name="T218"> Local Encode (optional FreeFactoryService)</text:span></text:span></text:p>
      <text:p text:style-name="P155"><text:span text:style-name="Source_20_Text"><text:span text:style-name="T225">This is a very basic DVCProHD factory. Please modify to suit your needs. Outputs in .mxf format.</text:span></text:span></text:p>
      <text:p text:style-name="P155"><text:span text:style-name="Source_20_Text"><text:span text:style-name="T227"/></text:span></text:p>
      <text:p text:style-name="P156"><text:span text:style-name="Source_20_Text"><text:span text:style-name="T226">LiveAudioStream_From-PulseAudio</text:span></text:span><text:span text:style-name="Source_20_Text"><text:span text:style-name="T216">:</text:span></text:span></text:p>
      <text:p text:style-name="P156"><text:span text:style-name="Source_20_Text"><text:span text:style-name="T217">Factory Type:</text:span></text:span><text:span text:style-name="Source_20_Text"><text:span text:style-name="T218"> Local </text:span></text:span><text:span text:style-name="Source_20_Text"><text:span text:style-name="T228">Stream</text:span></text:span></text:p>
      <text:p text:style-name="P156"><text:span text:style-name="Source_20_Text"><text:span text:style-name="T229">Streaming example for Pulse audio. </text:span></text:span></text:p>
      <text:p text:style-name="P156"><text:span text:style-name="Source_20_Text"><text:span text:style-name="T229"/></text:span></text:p>
      <text:p text:style-name="P156"><text:span text:style-name="Source_20_Text"><text:span text:style-name="T226">LiveAVStream_AudioFile</text:span></text:span><text:span text:style-name="Source_20_Text"><text:span text:style-name="T216">:</text:span></text:span></text:p>
      <text:p text:style-name="P156"><text:span text:style-name="Source_20_Text"><text:span text:style-name="T217">Factory Type:</text:span></text:span><text:span text:style-name="Source_20_Text"><text:span text:style-name="T218"> Local </text:span></text:span><text:span text:style-name="Source_20_Text"><text:span text:style-name="T228">Stream</text:span></text:span></text:p>
      <text:p text:style-name="P156"><text:span text:style-name="Source_20_Text"><text:span text:style-name="T229">Streaming example for live streaming an audio file. </text:span></text:span></text:p>
      <text:p text:style-name="P156"><text:span text:style-name="Source_20_Text"><text:span text:style-name="T226"/></text:span></text:p>
      <text:p text:style-name="P156"><text:span text:style-name="Source_20_Text"><text:span text:style-name="T226">LiveAVStream_</text:span></text:span><text:span text:style-name="Source_20_Text"><text:span text:style-name="T230">Video</text:span></text:span><text:span text:style-name="Source_20_Text"><text:span text:style-name="T226">File</text:span></text:span><text:span text:style-name="Source_20_Text"><text:span text:style-name="T216">:</text:span></text:span></text:p>
      <text:p text:style-name="P156"><text:span text:style-name="Source_20_Text"><text:span text:style-name="T217">Factory Type:</text:span></text:span><text:span text:style-name="Source_20_Text"><text:span text:style-name="T218"> Local </text:span></text:span><text:span text:style-name="Source_20_Text"><text:span text:style-name="T228">Stream</text:span></text:span></text:p>
      <text:p text:style-name="P156"><text:span text:style-name="Source_20_Text"><text:span text:style-name="T229">Streaming example for live streaming a video file with audio. </text:span></text:span></text:p>
      <text:p text:style-name="P156"><text:span text:style-name="Source_20_Text"><text:span text:style-name="T229"/></text:span></text:p>
      <text:p text:style-name="P156"><text:span text:style-name="Source_20_Text"><text:span text:style-name="T226">ProRes-422HQ</text:span></text:span><text:span text:style-name="Source_20_Text"><text:span text:style-name="T216">:</text:span></text:span></text:p>
      <text:p text:style-name="P156"><text:span text:style-name="Source_20_Text"><text:span text:style-name="T217">Factory Type:</text:span></text:span><text:span text:style-name="Source_20_Text"><text:span text:style-name="T218"> Local </text:span></text:span><text:span text:style-name="Source_20_Text"><text:span text:style-name="T228">Encode (</text:span></text:span><text:span text:style-name="Source_20_Text"><text:span text:style-name="T218">optional FreeFactoryService)</text:span></text:span></text:p>
      <text:p text:style-name="P156"><text:span text:style-name="Source_20_Text"><text:span text:style-name="T229">Create a ProRes 422HQ file using prores_ks codec and 24 bit audio.</text:span></text:span></text:p>
      <text:p text:style-name="P156"><text:span text:style-name="Source_20_Text"><text:span text:style-name="T229"/></text:span></text:p>
      <text:p text:style-name="P156"><text:span text:style-name="Source_20_Text"><text:span text:style-name="T226">ProRes-4444</text:span></text:span><text:span text:style-name="Source_20_Text"><text:span text:style-name="T216">:</text:span></text:span></text:p>
      <text:p text:style-name="P156"><text:span text:style-name="Source_20_Text"><text:span text:style-name="T217">Factory Type:</text:span></text:span><text:span text:style-name="Source_20_Text"><text:span text:style-name="T218"> Local </text:span></text:span><text:span text:style-name="Source_20_Text"><text:span text:style-name="T228">Encode (</text:span></text:span><text:span text:style-name="Source_20_Text"><text:span text:style-name="T218">optional FreeFactoryService)</text:span></text:span></text:p>
      <text:p text:style-name="P156"><text:span text:style-name="Source_20_Text"><text:span text:style-name="T229">Create a ProRes 4444 file using prores_ks codec and 24 bit audio and yuv4</text:span></text:span><text:span text:style-name="Source_20_Text"><text:span text:style-name="T219">44</text:span></text:span><text:span text:style-name="Source_20_Text"><text:span text:style-name="T229">p10le.</text:span></text:span></text:p>
      <text:p text:style-name="P156"><text:span text:style-name="Source_20_Text"><text:span text:style-name="T229"/></text:span></text:p>
      <text:p text:style-name="P156"><text:span text:style-name="Source_20_Text"><text:span text:style-name="T226">Recording_Factory_Test</text:span></text:span><text:span text:style-name="Source_20_Text"><text:span text:style-name="T216">:</text:span></text:span></text:p>
      <text:p text:style-name="P156"><text:span text:style-name="Source_20_Text"><text:span text:style-name="T217">Factory Type:</text:span></text:span><text:span text:style-name="Source_20_Text"><text:span text:style-name="T218"> </text:span></text:span><text:span text:style-name="Source_20_Text"><text:span text:style-name="T228">Recording Factory</text:span></text:span></text:p>
      <text:p text:style-name="P156"><text:span text:style-name="Source_20_Text"><text:span text:style-name="T229">Records a live stream to your HDD from a locally installed camera.</text:span></text:span></text:p>
      <text:p text:style-name="P156"><text:span text:style-name="Source_20_Text"><text:span text:style-name="T229"/></text:span></text:p>
      <text:p text:style-name="P156"><text:span text:style-name="Source_20_Text"><text:span text:style-name="T22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Mono" svg:font-family="'Luxi Mono'"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akTypeNaqsh" svg:font-family="PakTypeNaqsh" style:font-pitch="variable"/>
    <style:font-face style:name="Source Han Sans CN" svg:font-family="'Source Han Sans CN'" style:font-family-generic="system" style:font-pitch="variable"/>
    <style:font-face style:name="monospace" svg:font-family="monospace"/>
    <style:font-face style:name="monospace1" svg:font-family="monospace"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19T13:43:52.964928361</meta:creation-date>
    <dc:date>2026-06-19T19:41:01.680696602</dc:date>
    <meta:editing-duration>P1DT7H43M31S</meta:editing-duration>
    <meta:editing-cycles>91</meta:editing-cycles>
    <meta:generator>LibreOffice/25.8.7.3$Linux_X86_64 LibreOffice_project/580$Build-3</meta:generator>
    <meta:print-date>2026-05-30T20:28:28.273319868</meta:print-date>
    <meta:printed-by>PDF files</meta:printed-by>
    <meta:document-statistic meta:table-count="3" meta:image-count="17" meta:object-count="0" meta:page-count="21" meta:paragraph-count="392" meta:word-count="5813" meta:character-count="35942" meta:non-whitespace-character-count="30421"/>
  </office:meta>
</office:document-meta>
</file>